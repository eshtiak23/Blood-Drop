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text/html" manifest:full-path="Pictures/0.sht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Text_20_body" style:list-style-name="L7">
      <style:paragraph-properties fo:margin-top="0in" fo:margin-bottom="0in"/>
    </style:style>
    <style:style style:name="P189" style:family="paragraph" style:parent-style-name="Text_20_body" style:list-style-name="L8">
      <style:paragraph-properties fo:margin-top="0in" fo:margin-bottom="0in"/>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9">
      <style:paragraph-properties fo:margin-top="0in" fo:margin-bottom="0in"/>
    </style:style>
    <style:style style:name="P326" style:family="paragraph" style:parent-style-name="Text_20_body" style:list-style-name="L10">
      <style:paragraph-properties fo:margin-top="0in" fo:margin-bottom="0in"/>
    </style:style>
    <style:style style:name="P327" style:family="paragraph" style:parent-style-name="Text_20_body" style:list-style-name="L11">
      <style:paragraph-properties fo:margin-top="0in" fo:margin-bottom="0in"/>
    </style:style>
    <style:style style:name="P328" style:family="paragraph" style:parent-style-name="Text_20_body" style:list-style-name="L1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3592*"/>
    </style:style>
    <style:style style:name="Table1.B" style:family="table-column">
      <style:table-column-properties style:rel-column-width="20971*"/>
    </style:style>
    <style:style style:name="Table1.C" style:family="table-column">
      <style:table-column-properties style:rel-column-width="20971*"/>
    </style:style>
    <style:style style:name="Table2" style:family="table">
      <style:table-properties table:align="center" style:rel-width="100%"/>
    </style:style>
    <style:style style:name="Table2.A" style:family="table-column">
      <style:table-column-properties style:rel-column-width="37941*"/>
    </style:style>
    <style:style style:name="Table2.B" style:family="table-column">
      <style:table-column-properties style:rel-column-width="27593*"/>
    </style:style>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37941*"/>
    </style:style>
    <style:style style:name="Table4.B" style:family="table-column">
      <style:table-column-properties style:rel-column-width="27593*"/>
    </style:style>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21845*"/>
    </style:style>
    <style:style style:name="Table17.B" style:family="table-column">
      <style:table-column-properties style:rel-column-width="24272*"/>
    </style:style>
    <style:style style:name="Table17.C" style:family="table-column">
      <style:table-column-properties style:rel-column-width="19417*"/>
    </style:style>
  </office:automatic-styles>
  <office:body>
    <office:text>
      <text:h text:style-name="Heading_20_1" text:outline-level="1"><text:bookmark-start text:name="blooddrop-রকতদন-বযবসথপন-সসটম"/>BloodDrop – রক্তদান ব্যবস্থাপনা সিস্টেম<text:bookmark-end text:name="blooddrop-রকতদন-বযবসথপন-সসটম"/></text:h>
      <text:p text:style-name="Horizontal_20_Line"/>
      <text:h text:style-name="Heading_20_2" text:outline-level="2"><text:bookmark-start text:name="ডপলম-ইন-কমপউটর-সইনস-ও-পরকশল"/>ডিপ্লোমা ইন কম্পিউটার সাইন্স ও প্রকৌশল<text:bookmark-end text:name="ডপলম-ইন-কমপউটর-সইনস-ও-পরকশল"/></text:h>
      <text:h text:style-name="Heading_20_2" text:outline-level="2"><text:bookmark-start text:name="চডনত-পরকলপ-পরতবদন"/>চূড়ান্ত প্রকল্প প্রতিবেদন<text:bookmark-end text:name="চডনত-পরকলপ-পরতবদন"/></text:h>
      <text:p text:style-name="Horizontal_20_Line"/>
      <text:h text:style-name="Heading_20_3" text:outline-level="3"><text:bookmark-start text:name="blooddrop-blood-donation-management-system"/><text:span text:style-name="T1">BloodDrop – Blood Donation Management System</text:span><text:bookmark-end text:name="blooddrop-blood-donation-management-system"/></text:h>
      <text:h text:style-name="Heading_20_3" text:outline-level="3"><text:bookmark-start text:name="বলডডরপ-রকতদন-বযবসথপন-সসটম"/><text:span text:style-name="T1">ব্লাডড্রপ – রক্তদান ব্যবস্থাপনা সিস্টেম</text:span><text:bookmark-end text:name="বলডডরপ-রকতদন-বযবসথপন-সসটম"/></text:h>
      <text:p text:style-name="Horizontal_20_Line"/>
      <text:p text:style-name="First_20_paragraph"><text:span text:style-name="T1">রাজশাহী পলিটেকনিক ইনস্টিটিউট</text:span></text:p>
      <text:p text:style-name="Horizontal_20_Line"/>
      <text:p text:style-name="First_20_paragraph"><text:span text:style-name="T1">প্রকল্প পরিচালক:</text:span> MD. Eshtiak Ahmed</text:p>
      <text:p text:style-name="Text_20_body"><text:span text:style-name="T1">প্রকল্প টিম:</text:span> | ক্রমিক | নাম | ভূমিকা | |———|——|——–| | ১ | MD. Eshtiak Ahmed | প্রধান উন্নয়নকারী (Lead Developer) | | ২ | Md Towfiqur Rahman | সহ-উন্নয়নকারী | | ৩ | Abdur Rahman | সহ-উন্নয়নকারী | | ৪ | Sabbir Ahmed | সহ-উন্নয়নকারী | | ৫ | Al Yeamin Abir | সহ-উন্নয়নকারী |</text:p>
      <text:p text:style-name="Horizontal_20_Line"/>
      <text:p text:style-name="First_20_paragraph"><text:span text:style-name="T1">পর্যবেক্ষক/উপদেষ্টা:</text:span> [উপদেষ্টার নাম]</text:p>
      <text:p text:style-name="Text_20_body"><text:span text:style-name="T1">তারিখ:</text:span> জুলাই ২০২৬</text:p>
      <text:p text:style-name="Horizontal_20_Line"/>
      <text:p text:style-name="FigureWithCaption"><draw:frame draw:name="img1" svg:width="100.0pt" svg:height="100.0pt"><draw:image xlink:href="Pictures/0.shtml" xlink:type="simple" xlink:show="embed" xlink:actuate="onLoad"/></draw:frame></text:p>
      <text:p text:style-name="FigureCaption">LifeDrop Logo</text:p>
      <text:p text:style-name="Horizontal_20_Line"/>
      <text:h text:style-name="Heading_20_2" text:outline-level="2"><text:bookmark-start text:name="সচপতর-table-of-contents"/>সূচিপত্র (Table of Contents)<text:bookmark-end text:name="সচপতর-table-of-contents"/></text:h>
      <text:list text:style-name="L1">
        <text:list-item>
          <text:p text:style-name="P1"><text:a xlink:type="simple" xlink:href="#id_১-সারসংক্ষেপ-abstract" office:name=""><text:span text:style-name="Definition">সারসংক্ষেপ (Abstract)</text:span></text:a></text:p>
        </text:list-item>
        <text:list-item>
          <text:p text:style-name="P1"><text:a xlink:type="simple" xlink:href="#id_২-ভূমিকা-introduction" office:name=""><text:span text:style-name="Definition">ভূমিকা (Introduction)</text:span></text:a></text:p>
        </text:list-item>
        <text:list-item>
          <text:p text:style-name="P1"><text:a xlink:type="simple" xlink:href="#id_৩-সমস্যা-বিবরণ-problem-statement" office:name=""><text:span text:style-name="Definition">সমস্যা বিবরণ (Problem Statement)</text:span></text:a></text:p>
        </text:list-item>
        <text:list-item>
          <text:p text:style-name="P1"><text:a xlink:type="simple" xlink:href="#id_৪-প্রকল্পের-উদ্দেশ্য-objectives" office:name=""><text:span text:style-name="Definition">প্রকল্পের উদ্দেশ্য (Objectives)</text:span></text:a></text:p>
        </text:list-item>
        <text:list-item>
          <text:p text:style-name="P1"><text:a xlink:type="simple" xlink:href="#id_৫-বৈশিষ্ট্যসমূহ-features" office:name=""><text:span text:style-name="Definition">বৈশিষ্ট্যসমূহ (Features)</text:span></text:a></text:p>
        </text:list-item>
        <text:list-item>
          <text:p text:style-name="P1"><text:a xlink:type="simple" xlink:href="#id_৬-সিস্টেম-বিশ্লেষণ-system-analysis" office:name=""><text:span text:style-name="Definition">সিস্টেম বিশ্লেষণ (System Analysis)</text:span></text:a></text:p>
        </text:list-item>
        <text:list-item>
          <text:p text:style-name="P1"><text:a xlink:type="simple" xlink:href="#id_৭-সিস্টেম-ডিজাইন-system-design" office:name=""><text:span text:style-name="Definition">সিস্টেম ডিজাইন (System Design)</text:span></text:a></text:p>
        </text:list-item>
        <text:list-item>
          <text:p text:style-name="P1"><text:a xlink:type="simple" xlink:href="#id_৮-ব্যবহৃত-প্রযুক্তি-technologies-used" office:name=""><text:span text:style-name="Definition">ব্যবহৃত প্রযুক্তি (Technologies Used)</text:span></text:a></text:p>
        </text:list-item>
        <text:list-item>
          <text:p text:style-name="P1"><text:a xlink:type="simple" xlink:href="#id_৯-বাস্তবায়ন-বিবরণ-implementation-details" office:name=""><text:span text:style-name="Definition">বাস্তবায়ন বিবরণ (Implementation Details)</text:span></text:a></text:p>
        </text:list-item>
        <text:list-item>
          <text:p text:style-name="P1"><text:a xlink:type="simple" xlink:href="#id_১০-ফোল্ডার-কাঠামো-folder-structure" office:name=""><text:span text:style-name="Definition">ফোল্ডার কাঠামো (Folder Structure)</text:span></text:a></text:p>
        </text:list-item>
        <text:list-item>
          <text:p text:style-name="P1"><text:a xlink:type="simple" xlink:href="#id_১১-পরীক্ষা-নিরীক্ষা-testing" office:name=""><text:span text:style-name="Definition">পরীক্ষা-নিরীক্ষা (Testing)</text:span></text:a></text:p>
        </text:list-item>
        <text:list-item>
          <text:p text:style-name="P1"><text:a xlink:type="simple" xlink:href="#id_১২-চ্যালেঞ্জ-ও-সীমাবদ্ধতা-challenges--limitations" office:name=""><text:span text:style-name="Definition">চ্যালেঞ্জ ও সীমাবদ্ধতা (Challenges &amp; Limitations)</text:span></text:a></text:p>
        </text:list-item>
        <text:list-item>
          <text:p text:style-name="P1"><text:a xlink:type="simple" xlink:href="#id_১৩-ভবিষ্যৎ-উন্নয়ন-future-improvements" office:name=""><text:span text:style-name="Definition">ভবিষ্যৎ উন্নয়ন (Future Improvements)</text:span></text:a></text:p>
        </text:list-item>
        <text:list-item>
          <text:p text:style-name="P1"><text:a xlink:type="simple" xlink:href="#id_১৪-উপসংহার-conclusion" office:name=""><text:span text:style-name="Definition">উপসংহার (Conclusion)</text:span></text:a></text:p>
        </text:list-item>
        <text:list-item>
          <text:p text:style-name="P1"><text:a xlink:type="simple" xlink:href="#id_১৫-গ্রন্থপঞ্জি-references" office:name=""><text:span text:style-name="Definition">গ্রন্থপঞ্জি (References)</text:span></text:a></text:p>
        </text:list-item>
      </text:list>
      <text:p text:style-name="Horizontal_20_Line"/>
      <text:h text:style-name="Heading_20_2" text:outline-level="2"><text:bookmark-start text:name="সরসকষপ-abstract"/>১. সারসংক্ষেপ (Abstract)<text:bookmark-end text:name="সরসকষপ-abstract"/></text:h>
      <text:p text:style-name="First_20_paragraph">বাংলাদেশে রক্তদানের জন্য বর্তমানে কোনো সুষ্ঠু ও কার্যকর ডিজিটাল প্ল্যাটফর্ম নেই। জরুরি রক্তের প্রয়োজনে মানুষেরা মূলত ফেসবুক গ্রুপ, মুখে মুখে প্রচার বা ব্যক্তিগত পরিচিতির ওপর নির্ভর করে। এই পদ্ধতিতে সময়মতো রক্ত পাওয়া কঠিন, রক্তদাতার তথ্য যাচাই করা যায় না এবং কোনো ধরনের যোগাযোগ বা ট্র্যাকিং সুবিধা নেই।</text:p>
      <text:p text:style-name="Text_20_body"><text:span text:style-name="T1">BloodDrop</text:span> একটি আধুনিক ওয়েব-ভিত্তিক রক্তদান ব্যবস্থাপনা সিস্টেম যা রক্তদাতা ও রক্তপ্রাপকদের মধ্যে সেতুবন্ধন তৈরি করে। এই সিস্টেমে রক্তদাতাদের সন্ধান, রক্তের অনুরোধ, রিয়েল-টাইম চ্যাট, কানেকশন সিস্টেম, গেমিফিকেশন (XP ও র‍্যাংক), এবং ইমেইল নোটিফিকেশন অন্তর্ভুক্ত রয়েছে।</text:p>
      <text:p text:style-name="Text_20_body">প্রকল্পটি <text:span text:style-name="T1">React.js</text:span> (ফ্রন্টএন্ড), <text:span text:style-name="T1">Express.js</text:span> (ব্যাকএন্ড), <text:span text:style-name="T1">MongoDB Atlas</text:span> (ডাটাবেস), এবং <text:span text:style-name="T1">Socket.IO</text:span> (রিয়েল-টাইম যোগাযোগ) ব্যবহার করে তৈরি করা হয়েছে। সিস্টেমটি Vercel ও Render-এ ডিপ্লয় করা হয়েছে এবং বাংলাদেশের ১৫টি জেলায় ১৫০+ ডেমো রক্তদাতার ডেটা অন্তর্ভুক্ত রয়েছে।</text:p>
      <text:p text:style-name="Text_20_body">মূল বৈশিষ্ট্যগুলোর মধ্যে রয়েছে: জিওলোকেশন-ভিত্তিক রক্তদাতা অনুসন্ধান, রক্তের ধরন অনুযায়ী সার্চ, প্রোফাইল যাচাইকরণ, রিয়েল-টাইম চ্যাট ও টাইপিং ইন্ডিকেটর, বন্ধু সংযোগ সিস্টেম, এবং রক্তদান ট্র্যাকিং সিস্টেম।</text:p>
      <text:p text:style-name="Text_20_body"><text:span text:style-name="T1">শব্দকোষ:</text:span> রক্তদান, রক্তদাতা ব্যবস্থাপনা, React.js, MongoDB, Socket.IO, রিয়েল-টাইম চ্যাট, জিওলোকেশন।</text:p>
      <text:p text:style-name="Horizontal_20_Line"/>
      <text:h text:style-name="Heading_20_2" text:outline-level="2"><text:bookmark-start text:name="ভমক-introduction"/>২. ভূমিকা (Introduction)<text:bookmark-end text:name="ভমক-introduction"/></text:h>
      <text:h text:style-name="Heading_20_3" text:outline-level="3"><text:bookmark-start text:name="পটভম"/>২.১ পটভূমি<text:bookmark-end text:name="পটভম"/></text:h>
      <text:p text:style-name="First_20_paragraph">রক্তদান মানবজীবনের অন্যতম গুরুত্বপূর্ণ অংশ। প্রতিদিন বাংলাদেশে হাজার হাজার মানুষের রক্তের প্রয়োজন হয় — দুর্ঘটনা, অস্ত্রোপচার, রক্তাল্পতা, ক্যান্সার চিকিৎসা এবং বিভিন্ন জটিল রোগের চিকিৎসায়। তবে সঠিক সময়ে সঠিক রক্তের ধরনের রক্ত পাওয়া একটি বড় চ্যালেঞ্জ।</text:p>
      <text:p text:style-name="Text_20_body">বর্তমানে বাংলাদেশে রক্তের জন্য মানুষেরা মূলত নিম্নলিখিত পদ্ধতিতে নির্ভর করে:</text:p>
      <text:list text:style-name="L2">
        <text:list-item>
          <text:p text:style-name="P2"><text:span text:style-name="T1">ফেসবুক গ্রুপ:</text:span> বিভিন্ন ফেসবুক গ্রুপে পোস্ট করে রক্তদাতার সন্ধান করা।</text:p>
        </text:list-item>
        <text:list-item>
          <text:p text:style-name="P2"><text:span text:style-name="T1">মুখে মুখে প্রচার:</text:span> পরিচিতদের মাধ্যমে রক্তদাতার খোঁজ করা।</text:p>
        </text:list-item>
        <text:list-item>
          <text:p text:style-name="P2"><text:span text:style-name="T1">সরাসরি হাসপাতালে যাওয়া:</text:span> হাসপাতালে গিয়ে রক্তদাতার সন্ধান করা।</text:p>
        </text:list-item>
      </text:list>
      <text:p text:style-name="First_20_paragraph">এই পদ্ধতিগুলো অত্যন্ত অকার্যকর এবং এতে অনেক সময় অপচয় হয়। জরুরি পরিস্থিতিতে সঠিক সময়ে রক্ত না পাওয়ায় অনেকে প্রাণ হারাচ্ছেন।</text:p>
      <text:h text:style-name="Heading_20_3" text:outline-level="3"><text:bookmark-start text:name="পরকলপর-ধরণ"/>২.২ প্রকল্পের ধারণা<text:bookmark-end text:name="পরকলপর-ধরণ"/></text:h>
      <text:p text:style-name="First_20_paragraph"><text:span text:style-name="T1">BloodDrop</text:span> সিস্টেমটি এই সমস্যার সমাধানে একটি আধুনিক ডিজিটাল প্ল্যাটফর্ম হিসেবে কাজ করে। এটি একটি ফুল-স্ট্যাক ওয়েব অ্যাপ্লিকেশন যা:</text:p>
      <text:list text:style-name="L3">
        <text:list-item>
          <text:p text:style-name="P3">রক্তদাতাদের একটি কেন্দ্রীয় ডাটাবেসে সংরক্ষণ করে</text:p>
        </text:list-item>
        <text:list-item>
          <text:p text:style-name="P3">রক্তের অনুরোধ তৈরি ও ব্যবস্থাপনা করে</text:p>
        </text:list-item>
        <text:list-item>
          <text:p text:style-name="P3">রিয়েল-টাইম চ্যাটের মাধ্যমে যোগাযোগ সহজ করে</text:p>
        </text:list-item>
        <text:list-item>
          <text:p text:style-name="P3">জিওলোকেশন ব্যবহার করে কাছের রক্তদাতা খুঁজে বের করে</text:p>
        </text:list-item>
        <text:list-item>
          <text:p text:style-name="P3">রক্তদাতাদের অংশগ্রহণ গেমিফাই করে</text:p>
        </text:list-item>
      </text:list>
      <text:h text:style-name="Heading_20_3" text:outline-level="3"><text:bookmark-start text:name="পরকলপর-সম"/>২.৩ প্রকল্পের সীমা<text:bookmark-end text:name="পরকলপর-সম"/></text:h>
      <text:p text:style-name="First_20_paragraph">এই সিস্টেমটি মূলত বাংলাদেশের প্রেক্ষাপটে ডিজাইন করা হয়েছে। এতে বাংলাদেশের ১৫টি প্রধান জেলার রক্তদাতার ডেটা অন্তর্ভুক্ত রয়েছে এবং বাংলাদেশের ফোন নম্বর ফরম্যাট (01XXXXXXXXX) সমর্থন করে।</text:p>
      <text:p text:style-name="Horizontal_20_Line"/>
      <text:h text:style-name="Heading_20_2" text:outline-level="2"><text:bookmark-start text:name="সমসয-ববরণ-problem-statement"/>৩. সমস্যা বিবরণ (Problem Statement)<text:bookmark-end text:name="সমসয-ববরণ-problem-statement"/></text:h>
      <text:h text:style-name="Heading_20_3" text:outline-level="3"><text:bookmark-start text:name="বরতমন-সমসয"/>৩.১ বর্তমান সমস্যা<text:bookmark-end text:name="বরতমন-সমসয"/></text:h>
      <text:p text:style-name="First_20_paragraph">বাংলাদেশে রক্তদান ব্যবস্থাপনায় নিম্নলিখিত সমস্যাগুলো বিদ্যমান:</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ক্রমিক</text:p>
            </table:table-cell>
            <table:table-cell table:style-name="TableHeaderRowCell" office:value-type="string">
              <text:p text:style-name="Table_20_Heading">সমস্যা</text:p>
            </table:table-cell>
            <table:table-cell table:style-name="TableHeaderRowCell" office:value-type="string">
              <text:p text:style-name="Table_20_Heading">বিবরণ</text:p>
            </table:table-cell>
          </table:table-row>
        </table:table-header-rows>
        <table:table-row>
          <table:table-cell table:style-name="TableRowCell" office:value-type="string">
            <text:p text:style-name="Table_20_Contents">১</text:p>
          </table:table-cell>
          <table:table-cell table:style-name="TableRowCell" office:value-type="string">
            <text:p text:style-name="Table_20_Contents">কেন্দ্রীয় ডাটাবেসের অভাব</text:p>
          </table:table-cell>
          <table:table-cell table:style-name="TableRowCell" office:value-type="string">
            <text:p text:style-name="Table_20_Contents">রক্তদাতাদের কোনো সুষ্ঠু ডাটাবেস নেই</text:p>
          </table:table-cell>
        </table:table-row>
        <table:table-row>
          <table:table-cell table:style-name="TableRowCell" office:value-type="string">
            <text:p text:style-name="Table_20_Contents">২</text:p>
          </table:table-cell>
          <table:table-cell table:style-name="TableRowCell" office:value-type="string">
            <text:p text:style-name="Table_20_Contents">তথ্য যাচাইয়ের অভাব</text:p>
          </table:table-cell>
          <table:table-cell table:style-name="TableRowCell" office:value-type="string">
            <text:p text:style-name="Table_20_Contents">ফেসবুকে পোস্ট করা তথ্য সত্য কিনা তা যাচাই করা যায় না</text:p>
          </table:table-cell>
        </table:table-row>
        <table:table-row>
          <table:table-cell table:style-name="TableRowCell" office:value-type="string">
            <text:p text:style-name="Table_20_Contents">৩</text:p>
          </table:table-cell>
          <table:table-cell table:style-name="TableRowCell" office:value-type="string">
            <text:p text:style-name="Table_20_Contents">ধীর প্রক্রিয়া</text:p>
          </table:table-cell>
          <table:table-cell table:style-name="TableRowCell" office:value-type="string">
            <text:p text:style-name="Table_20_Contents">রক্তের জন্য অনুরোধ করলে ঘণ্টার পর ঘণ্টা অপেক্ষা করতে হয়</text:p>
          </table:table-cell>
        </table:table-row>
        <table:table-row>
          <table:table-cell table:style-name="TableRowCell" office:value-type="string">
            <text:p text:style-name="Table_20_Contents">৪</text:p>
          </table:table-cell>
          <table:table-cell table:style-name="TableRowCell" office:value-type="string">
            <text:p text:style-name="Table_20_Contents">যোগাযোগের অভাব</text:p>
          </table:table-cell>
          <table:table-cell table:style-name="TableRowCell" office:value-type="string">
            <text:p text:style-name="Table_20_Contents">রক্তদাতা ও রক্তপ্রাপকের মধ্যে সরাসরি যোগাযোগের সুবিধা নেই</text:p>
          </table:table-cell>
        </table:table-row>
        <table:table-row>
          <table:table-cell table:style-name="TableRowCell" office:value-type="string">
            <text:p text:style-name="Table_20_Contents">৫</text:p>
          </table:table-cell>
          <table:table-cell table:style-name="TableRowCell" office:value-type="string">
            <text:p text:style-name="Table_20_Contents">জিওলোকেশন সুবিধার অভাব</text:p>
          </table:table-cell>
          <table:table-cell table:style-name="TableRowCell" office:value-type="string">
            <text:p text:style-name="Table_20_Contents">কাছের রক্তদাতা খুঁজে বের করার কোনো উপায় নেই</text:p>
          </table:table-cell>
        </table:table-row>
        <table:table-row>
          <table:table-cell table:style-name="TableRowCell" office:value-type="string">
            <text:p text:style-name="Table_20_Contents">৬</text:p>
          </table:table-cell>
          <table:table-cell table:style-name="TableRowCell" office:value-type="string">
            <text:p text:style-name="Table_20_Contents">রক্তদান ট্র্যাকিংয়ের অভাব</text:p>
          </table:table-cell>
          <table:table-cell table:style-name="TableRowCell" office:value-type="string">
            <text:p text:style-name="Table_20_Contents">কে কতবার রক্তদান করেছে তার কোনো হিসাব নেই</text:p>
          </table:table-cell>
        </table:table-row>
        <table:table-row>
          <table:table-cell table:style-name="TableRowCell" office:value-type="string">
            <text:p text:style-name="Table_20_Contents">৭</text:p>
          </table:table-cell>
          <table:table-cell table:style-name="TableRowCell" office:value-type="string">
            <text:p text:style-name="Table_20_Contents">রিয়েল-টাইম যোগাযোগের অভাব</text:p>
          </table:table-cell>
          <table:table-cell table:style-name="TableRowCell" office:value-type="string">
            <text:p text:style-name="Table_20_Contents">জরুরি পরিস্থিতিতে তাৎক্ষণিক যোগাযোগের সুবিধা নেই</text:p>
          </table:table-cell>
        </table:table-row>
      </table:table>
      <text:h text:style-name="Heading_20_3" text:outline-level="3"><text:bookmark-start text:name="পরসতবত-সমধন"/>৩.২ প্রস্তাবিত সমাধান<text:bookmark-end text:name="পরসতবত-সমধন"/></text:h>
      <text:p text:style-name="First_20_paragraph">BloodDrop সিস্টেমটি এই সমস্যাগুলোর সমাধানে নিম্নলিখিত পদ্ধতি প্রস্তাব করে:</text:p>
      <text:list text:style-name="L4">
        <text:list-item>
          <text:p text:style-name="P4"><text:span text:style-name="T1">কেন্দ্রীয় ডাটাবেস:</text:span> MongoDB Atlas-এ সকল রক্তদাতার তথ্য সংরক্ষণ</text:p>
        </text:list-item>
        <text:list-item>
          <text:p text:style-name="P4"><text:span text:style-name="T1">যাচাইকৃত প্রোফাইল:</text:span> ইমেইল ভিত্তিক নিবন্ধন ও প্রোফাইল যাচাইকরণ</text:p>
        </text:list-item>
        <text:list-item>
          <text:p text:style-name="P4"><text:span text:style-name="T1">স্বয়ংক্রিয় অনুসন্ধান:</text:span> রক্তের ধরন ও জেলা অনুযায়ী স্বয়ংক্রিয় সার্চ</text:p>
        </text:list-item>
        <text:list-item>
          <text:p text:style-name="P4"><text:span text:style-name="T1">রিয়েল-টাইম চ্যাট:</text:span> Socket.IO ব্যবহার করে তাৎক্ষণিক যোগাযোগ</text:p>
        </text:list-item>
        <text:list-item>
          <text:p text:style-name="P4"><text:span text:style-name="T1">জিওলোকেশন:</text:span> Haversine Formula ব্যবহার করে কাছের রক্তদাতা খোঁজা</text:p>
        </text:list-item>
        <text:list-item>
          <text:p text:style-name="P4"><text:span text:style-name="T1">গেমিফিকেশন:</text:span> XP ও র‍্যাংক সিস্টেমের মাধ্যমে রক্তদাতাদের উৎসাহিত করা</text:p>
        </text:list-item>
      </text:list>
      <text:p text:style-name="Horizontal_20_Line"/>
      <text:h text:style-name="Heading_20_2" text:outline-level="2"><text:bookmark-start text:name="পরকলপর-উদদশয-objectives"/>৪. প্রকল্পের উদ্দেশ্য (Objectives)<text:bookmark-end text:name="পরকলপর-উদদশয-objectives"/></text:h>
      <text:p text:style-name="First_20_paragraph">এই প্রকল্পের প্রধান উদ্দেশ্যগুলো হলো:</text:p>
      <text:list text:style-name="L5">
        <text:list-item>
          <text:p text:style-name="P5"><text:span text:style-name="T1">কেন্দ্রীয় রক্তদাতা ডাটাবেস তৈরি করা</text:span> — বাংলাদেশের রক্তদাতাদের একটি সুষ্ঠু ডাটাবেস তৈরি করা যাতে রক্তের প্রয়োজনে দ্রুত রক্তদাতা খুঁজে পাওয়া যায়।</text:p>
        </text:list-item>
        <text:list-item>
          <text:p text:style-name="P5"><text:span text:style-name="T1">রক্তের অনুরোধ ব্যবস্থাপনা সহজ করা</text:span> — রক্তপ্রাপকদের সহজেই রক্তের অনুরোধ তৈরি করতে এবং রক্তদাতাদের সেই অনুরোধ গ্রহণ করতে সক্ষম করা।</text:p>
        </text:list-item>
        <text:list-item>
          <text:p text:style-name="P5"><text:span text:style-name="T1">রিয়েল-টাইম যোগাযোগ প্রদান করা</text:span> — রক্তদাতা ও রক্তপ্রাপকের মধ্যে তাৎক্ষণিক চ্যাট ও যোগাযোগের সুবিধা প্রদান করা।</text:p>
        </text:list-item>
        <text:list-item>
          <text:p text:style-name="P5"><text:span text:style-name="T1">জিওলোকেশন-ভিত্তিক অনুসন্ধান বাস্তবায়ন করা</text:span> — Haversine Formula ব্যবহার করে ব্যবহারকারীর অবস্থানের কাছের রক্তদাতা খুঁজে বের করা।</text:p>
        </text:list-item>
        <text:list-item>
          <text:p text:style-name="P5"><text:span text:style-name="T1">রক্তদান ট্র্যাকিং ও গেমিফিকেশন প্রদান করা</text:span> — রক্তদাতাদের রক্তদানের ইতিহাস ট্র্যাক করা এবং XP ও র‍্যাংক সিস্টেমের মাধ্যমে তাদের উৎসাহিত করা।</text:p>
        </text:list-item>
        <text:list-item>
          <text:p text:style-name="P5"><text:span text:style-name="T1">নিরাপদ ও ব্যবহারকারী-বান্ধব প্ল্যাটফর্ম তৈরি করা</text:span> — JWT অথেনটিকেশন, পাসওয়ার্ড হ্যাশিং, এবং ইনপুট ভ্যালিডেশনের মাধ্যমে নিরাপদ একটি প্ল্যাটফর্ম তৈরি করা।</text:p>
        </text:list-item>
      </text:list>
      <text:p text:style-name="Horizontal_20_Line"/>
      <text:h text:style-name="Heading_20_2" text:outline-level="2"><text:bookmark-start text:name="বশষটযসমহ-features"/>৫. বৈশিষ্ট্যসমূহ (Features)<text:bookmark-end text:name="বশষটযসমহ-features"/></text:h>
      <text:h text:style-name="Heading_20_3" text:outline-level="3"><text:bookmark-start text:name="মডউলভততক-বশষটয-তলক"/>৫.১ মডিউলভিত্তিক বৈশিষ্ট্য তালিকা<text:bookmark-end text:name="মডউলভততক-বশষটয-তলক"/></text:h>
      <text:h text:style-name="Heading_20_4" text:outline-level="4"><text:bookmark-start text:name="মডউল-১-বযবহরকর-বযবসথপন-authentication-user-management"/>মডিউল ১: ব্যবহারকারী ব্যবস্থাপনা (Authentication &amp; User Management)<text:bookmark-end text:name="মডউল-১-বযবহরকর-বযবসথপন-authentication-user-management"/></text:h>
      <table:table table:name="Table2" table:style-name="Table2">
        <table:table-column table:style-name="Table2.A"/>
        <table:table-column table:style-name="Table2.B"/>
        <table:table-header-rows>
          <table:table-row>
            <table:table-cell table:style-name="TableHeaderRowCell" office:value-type="string">
              <text:p text:style-name="Table_20_Heading">বৈশিষ্ট্য</text:p>
            </table:table-cell>
            <table:table-cell table:style-name="TableHeaderRowCell" office:value-type="string">
              <text:p text:style-name="Table_20_Heading">বিবরণ</text:p>
            </table:table-cell>
          </table:table-row>
        </table:table-header-rows>
        <table:table-row>
          <table:table-cell table:style-name="TableRowCell" office:value-type="string">
            <text:p text:style-name="Table_20_Contents">নিবন্ধন (Registration)</text:p>
          </table:table-cell>
          <table:table-cell table:style-name="TableRowCell" office:value-type="string">
            <text:p text:style-name="Table_20_Contents">ইমেইল, পাসওয়ার্ড, নাম, ফোন, রক্তের ধরন, জেলা দিয়ে নিবন্ধন</text:p>
          </table:table-cell>
        </table:table-row>
        <table:table-row>
          <table:table-cell table:style-name="TableRowCell" office:value-type="string">
            <text:p text:style-name="Table_20_Contents">লগইন (Login)</text:p>
          </table:table-cell>
          <table:table-cell table:style-name="TableRowCell" office:value-type="string">
            <text:p text:style-name="Table_20_Contents">ইমেইল ও পাসওয়ার্ড দিয়ে লগইন</text:p>
          </table:table-cell>
        </table:table-row>
        <table:table-row>
          <table:table-cell table:style-name="TableRowCell" office:value-type="string">
            <text:p text:style-name="Table_20_Contents">প্রোফাইল আপডেট</text:p>
          </table:table-cell>
          <table:table-cell table:style-name="TableRowCell" office:value-type="string">
            <text:p text:style-name="Table_20_Contents">নাম, ফোন, জেলা, এলাকা, ছবি, বায়ো সম্পাদনা</text:p>
          </table:table-cell>
        </table:table-row>
        <table:table-row>
          <table:table-cell table:style-name="TableRowCell" office:value-type="string">
            <text:p text:style-name="Table_20_Contents">পাসওয়ার্ড নিরাপত্তা</text:p>
          </table:table-cell>
          <table:table-cell table:style-name="TableRowCell" office:value-type="string">
            <text:p text:style-name="Table_20_Contents">bcrypt দিয়ে ১২ সাল্ট রাউন্ডে হ্যাশিং</text:p>
          </table:table-cell>
        </table:table-row>
        <table:table-row>
          <table:table-cell table:style-name="TableRowCell" office:value-type="string">
            <text:p text:style-name="Table_20_Contents">JWT অথেনটিকেশন</text:p>
          </table:table-cell>
          <table:table-cell table:style-name="TableRowCell" office:value-type="string">
            <text:p text:style-name="Table_20_Contents">স্টেটলেস টোকেন ভিত্তিক অথেনটিকেশন (৭ দিনের মেয়াদ)</text:p>
          </table:table-cell>
        </table:table-row>
      </table:table>
      <text:h text:style-name="Heading_20_4" text:outline-level="4"><text:bookmark-start text:name="মডউল-২-রকতদত-বযবসথপন-donor-management"/>মডিউল ২: রক্তদাতা ব্যবস্থাপনা (Donor Management)<text:bookmark-end text:name="মডউল-২-রকতদত-বযবসথপন-donor-management"/></text:h>
      <table:table table:name="Table3" table:style-name="Table3">
        <table:table-column table:style-name="Table3.A"/>
        <table:table-column table:style-name="Table3.B"/>
        <table:table-header-rows>
          <table:table-row>
            <table:table-cell table:style-name="TableHeaderRowCell" office:value-type="string">
              <text:p text:style-name="Table_20_Heading">বৈশিষ্ট্য</text:p>
            </table:table-cell>
            <table:table-cell table:style-name="TableHeaderRowCell" office:value-type="string">
              <text:p text:style-name="Table_20_Heading">বিবরণ</text:p>
            </table:table-cell>
          </table:table-row>
        </table:table-header-rows>
        <table:table-row>
          <table:table-cell table:style-name="TableRowCell" office:value-type="string">
            <text:p text:style-name="Table_20_Contents">রক্তদাতা অনুসন্ধান</text:p>
          </table:table-cell>
          <table:table-cell table:style-name="TableRowCell" office:value-type="string">
            <text:p text:style-name="Table_20_Contents">রক্তের ধরন, জেলা, এলাকা অনুযায়ী ফিল্টারিং</text:p>
          </table:table-cell>
        </table:table-row>
        <table:table-row>
          <table:table-cell table:style-name="TableRowCell" office:value-type="string">
            <text:p text:style-name="Table_20_Contents">জিওলোকেশন সার্চ</text:p>
          </table:table-cell>
          <table:table-cell table:style-name="TableRowCell" office:value-type="string">
            <text:p text:style-name="Table_20_Contents">Haversine Formula ব্যবহার করে কাছের রক্তদাতা খোঁজা</text:p>
          </table:table-cell>
        </table:table-row>
        <table:table-row>
          <table:table-cell table:style-name="TableRowCell" office:value-type="string">
            <text:p text:style-name="Table_20_Contents">প্রোফাইল দেখা</text:p>
          </table:table-cell>
          <table:table-cell table:style-name="TableRowCell" office:value-type="string">
            <text:p text:style-name="Table_20_Contents">রক্তদাতার সম্পূর্ণ প্রোফাইল দেখা</text:p>
          </table:table-cell>
        </table:table-row>
        <table:table-row>
          <table:table-cell table:style-name="TableRowCell" office:value-type="string">
            <text:p text:style-name="Table_20_Contents">বুকমার্ক</text:p>
          </table:table-cell>
          <table:table-cell table:style-name="TableRowCell" office:value-type="string">
            <text:p text:style-name="Table_20_Contents">পছন্দের রক্তদাতাদের সংরক্ষণ করা</text:p>
          </table:table-cell>
        </table:table-row>
        <table:table-row>
          <table:table-cell table:style-name="TableRowCell" office:value-type="string">
            <text:p text:style-name="Table_20_Contents">লিডারবোর্ড</text:p>
          </table:table-cell>
          <table:table-cell table:style-name="TableRowCell" office:value-type="string">
            <text:p text:style-name="Table_20_Contents">সর্বোচ্চ রক্তদানকারীদের তালিকা</text:p>
          </table:table-cell>
        </table:table-row>
      </table:table>
      <text:h text:style-name="Heading_20_4" text:outline-level="4"><text:bookmark-start text:name="মডউল-৩-রকতর-অনরধ-blood-request-system"/>মডিউল ৩: রক্তের অনুরোধ (Blood Request System)<text:bookmark-end text:name="মডউল-৩-রকতর-অনরধ-blood-request-system"/></text:h>
      <table:table table:name="Table4" table:style-name="Table4">
        <table:table-column table:style-name="Table4.A"/>
        <table:table-column table:style-name="Table4.B"/>
        <table:table-header-rows>
          <table:table-row>
            <table:table-cell table:style-name="TableHeaderRowCell" office:value-type="string">
              <text:p text:style-name="Table_20_Heading">বৈশিষ্ট্য</text:p>
            </table:table-cell>
            <table:table-cell table:style-name="TableHeaderRowCell" office:value-type="string">
              <text:p text:style-name="Table_20_Heading">বিবরণ</text:p>
            </table:table-cell>
          </table:table-row>
        </table:table-header-rows>
        <table:table-row>
          <table:table-cell table:style-name="TableRowCell" office:value-type="string">
            <text:p text:style-name="Table_20_Contents">অনুরোধ তৈরি</text:p>
          </table:table-cell>
          <table:table-cell table:style-name="TableRowCell" office:value-type="string">
            <text:p text:style-name="Table_20_Contents">রোগীর নাম, হাসপাতাল, রক্তের ধরন, জরুরি মাত্রা দিয়ে অনুরোধ</text:p>
          </table:table-cell>
        </table:table-row>
        <table:table-row>
          <table:table-cell table:style-name="TableRowCell" office:value-type="string">
            <text:p text:style-name="Table_20_Contents">অনুরোধ স্বীকার</text:p>
          </table:table-cell>
          <table:table-cell table:style-name="TableRowCell" office:value-type="string">
            <text:p text:style-name="Table_20_Contents">রক্তদাতা অনুরোধ গ্রহণ করতে পারেন</text:p>
          </table:table-cell>
        </table:table-row>
        <table:table-row>
          <table:table-cell table:style-name="TableRowCell" office:value-type="string">
            <text:p text:style-name="Table_20_Contents">অনুরোধ সম্পূর্ণ</text:p>
          </table:table-cell>
          <table:table-cell table:style-name="TableRowCell" office:value-type="string">
            <text:p text:style-name="Table_20_Contents">রক্তদান সম্পূর্ণ হলে মার্ক করা</text:p>
          </table:table-cell>
        </table:table-row>
        <table:table-row>
          <table:table-cell table:style-name="TableRowCell" office:value-type="string">
            <text:p text:style-name="Table_20_Contents">ম্যাচিং নোটিফিকেশন</text:p>
          </table:table-cell>
          <table:table-cell table:style-name="TableRowCell" office:value-type="string">
            <text:p text:style-name="Table_20_Contents">মিলিয়ে যাওয়া রক্তের ধরনের ব্যবহারকারীদের ইমেইল পাঠানো</text:p>
          </table:table-cell>
        </table:table-row>
        <table:table-row>
          <table:table-cell table:style-name="TableRowCell" office:value-type="string">
            <text:p text:style-name="Table_20_Contents">স্ট্যাটাস ট্র্যাকিং</text:p>
          </table:table-cell>
          <table:table-cell table:style-name="TableRowCell" office:value-type="string">
            <text:p text:style-name="Table_20_Contents">অনুরোধের অবস্থা (open/accepted/completed/cancelled) ট্র্যাক করা</text:p>
          </table:table-cell>
        </table:table-row>
      </table:table>
      <text:h text:style-name="Heading_20_4" text:outline-level="4"><text:bookmark-start text:name="মডউল-৪-রযল-টইম-চযট-real-time-chat"/>মডিউল ৪: রিয়েল-টাইম চ্যাট (Real-Time Chat)<text:bookmark-end text:name="মডউল-৪-রযল-টইম-চযট-real-time-chat"/></text:h>
      <table:table table:name="Table5" table:style-name="Table5">
        <table:table-column table:style-name="Table5.A"/>
        <table:table-column table:style-name="Table5.B"/>
        <table:table-header-rows>
          <table:table-row>
            <table:table-cell table:style-name="TableHeaderRowCell" office:value-type="string">
              <text:p text:style-name="Table_20_Heading">বৈশিষ্ট্য</text:p>
            </table:table-cell>
            <table:table-cell table:style-name="TableHeaderRowCell" office:value-type="string">
              <text:p text:style-name="Table_20_Heading">বিবরণ</text:p>
            </table:table-cell>
          </table:table-row>
        </table:table-header-rows>
        <table:table-row>
          <table:table-cell table:style-name="TableRowCell" office:value-type="string">
            <text:p text:style-name="Table_20_Contents">১-টু-১ চ্যাট</text:p>
          </table:table-cell>
          <table:table-cell table:style-name="TableRowCell" office:value-type="string">
            <text:p text:style-name="Table_20_Contents">ব্যবহারকারীদের মধ্যে সরাসরি চ্যাট</text:p>
          </table:table-cell>
        </table:table-row>
        <table:table-row>
          <table:table-cell table:style-name="TableRowCell" office:value-type="string">
            <text:p text:style-name="Table_20_Contents">অনলাইন স্ট্যাটাস</text:p>
          </table:table-cell>
          <table:table-cell table:style-name="TableRowCell" office:value-type="string">
            <text:p text:style-name="Table_20_Contents">ব্যবহারকারী অনলাইনে আছে কিনা তা দেখানো</text:p>
          </table:table-cell>
        </table:table-row>
        <table:table-row>
          <table:table-cell table:style-name="TableRowCell" office:value-type="string">
            <text:p text:style-name="Table_20_Contents">টাইপিং ইন্ডিকেটর</text:p>
          </table:table-cell>
          <table:table-cell table:style-name="TableRowCell" office:value-type="string">
            <text:p text:style-name="Table_20_Contents">অন্য ব্যবহারকারী টাইপ করছে কিনা তা দেখানো</text:p>
          </table:table-cell>
        </table:table-row>
        <table:table-row>
          <table:table-cell table:style-name="TableRowCell" office:value-type="string">
            <text:p text:style-name="Table_20_Contents">রিড রিসিট</text:p>
          </table:table-cell>
          <table:table-cell table:style-name="TableRowCell" office:value-type="string">
            <text:p text:style-name="Table_20_Contents">মেসেজ পড়া হয়েছে কিনা তা জানানো (ডাবল চেকমার্ক)</text:p>
          </table:table-cell>
        </table:table-row>
        <table:table-row>
          <table:table-cell table:style-name="TableRowCell" office:value-type="string">
            <text:p text:style-name="Table_20_Contents">ইমেজ শেয়ারিং</text:p>
          </table:table-cell>
          <table:table-cell table:style-name="TableRowCell" office:value-type="string">
            <text:p text:style-name="Table_20_Contents">2MB পর্যন্ত ছবি পাঠানো</text:p>
          </table:table-cell>
        </table:table-row>
        <table:table-row>
          <table:table-cell table:style-name="TableRowCell" office:value-type="string">
            <text:p text:style-name="Table_20_Contents">ইমোজি পিকার</text:p>
          </table:table-cell>
          <table:table-cell table:style-name="TableRowCell" office:value-type="string">
            <text:p text:style-name="Table_20_Contents">১০০+ ইমোজি সমর্থন</text:p>
          </table:table-cell>
        </table:table-row>
        <table:table-row>
          <table:table-cell table:style-name="TableRowCell" office:value-type="string">
            <text:p text:style-name="Table_20_Contents">মেসেজ ডিলিট</text:p>
          </table:table-cell>
          <table:table-cell table:style-name="TableRowCell" office:value-type="string">
            <text:p text:style-name="Table_20_Contents">নিজের পাঠানো মেসেজ ডিলিট করা</text:p>
          </table:table-cell>
        </table:table-row>
      </table:table>
      <text:h text:style-name="Heading_20_4" text:outline-level="4"><text:bookmark-start text:name="মডউল-৫-কনকশন-সসটম-connection-system"/>মডিউল ৫: কানেকশন সিস্টেম (Connection System)<text:bookmark-end text:name="মডউল-৫-কনকশন-সসটম-connection-system"/></text:h>
      <table:table table:name="Table6" table:style-name="Table6">
        <table:table-column table:style-name="Table6.A"/>
        <table:table-column table:style-name="Table6.B"/>
        <table:table-header-rows>
          <table:table-row>
            <table:table-cell table:style-name="TableHeaderRowCell" office:value-type="string">
              <text:p text:style-name="Table_20_Heading">বৈশিষ্ট্য</text:p>
            </table:table-cell>
            <table:table-cell table:style-name="TableHeaderRowCell" office:value-type="string">
              <text:p text:style-name="Table_20_Heading">বিবরণ</text:p>
            </table:table-cell>
          </table:table-row>
        </table:table-header-rows>
        <table:table-row>
          <table:table-cell table:style-name="TableRowCell" office:value-type="string">
            <text:p text:style-name="Table_20_Contents">কানেকশন রিকোয়েস্ট</text:p>
          </table:table-cell>
          <table:table-cell table:style-name="TableRowCell" office:value-type="string">
            <text:p text:style-name="Table_20_Contents">অন্য ব্যবহারকারীকে কানেকশন রিকোয়েস্ট পাঠানো</text:p>
          </table:table-cell>
        </table:table-row>
        <table:table-row>
          <table:table-cell table:style-name="TableRowCell" office:value-type="string">
            <text:p text:style-name="Table_20_Contents">গ্রহণ/প্রত্যাখ্যান</text:p>
          </table:table-cell>
          <table:table-cell table:style-name="TableRowCell" office:value-type="string">
            <text:p text:style-name="Table_20_Contents">কানেকশন রিকোয়েস্ট গ্রহণ বা প্রত্যাখ্যান করা</text:p>
          </table:table-cell>
        </table:table-row>
        <table:table-row>
          <table:table-cell table:style-name="TableRowCell" office:value-type="string">
            <text:p text:style-name="Table_20_Contents">ফোন নম্বর প্রকাশ</text:p>
          </table:table-cell>
          <table:table-cell table:style-name="TableRowCell" office:value-type="string">
            <text:p text:style-name="Table_20_Contents">কানেকশন গ্রহণের পর ফোন নম্বর দেখা</text:p>
          </table:table-cell>
        </table:table-row>
        <table:table-row>
          <table:table-cell table:style-name="TableRowCell" office:value-type="string">
            <text:p text:style-name="Table_20_Contents">নোটিফিকেশন</text:p>
          </table:table-cell>
          <table:table-cell table:style-name="TableRowCell" office:value-type="string">
            <text:p text:style-name="Table_20_Contents">কানেকশন রিকোয়েস্টের নোটিফিকেশন</text:p>
          </table:table-cell>
        </table:table-row>
      </table:table>
      <text:h text:style-name="Heading_20_4" text:outline-level="4"><text:bookmark-start text:name="মডউল-৬-গমফকশন-ও-টরযক-gamification-tracking"/>মডিউল ৬: গেমিফিকেশন ও ট্র্যাকিং (Gamification &amp; Tracking)<text:bookmark-end text:name="মডউল-৬-গমফকশন-ও-টরযক-gamification-tracking"/></text:h>
      <table:table table:name="Table7" table:style-name="Table7">
        <table:table-column table:style-name="Table7.A"/>
        <table:table-column table:style-name="Table7.B"/>
        <table:table-header-rows>
          <table:table-row>
            <table:table-cell table:style-name="TableHeaderRowCell" office:value-type="string">
              <text:p text:style-name="Table_20_Heading">বৈশিষ্ট্য</text:p>
            </table:table-cell>
            <table:table-cell table:style-name="TableHeaderRowCell" office:value-type="string">
              <text:p text:style-name="Table_20_Heading">বিবরণ</text:p>
            </table:table-cell>
          </table:table-row>
        </table:table-header-rows>
        <table:table-row>
          <table:table-cell table:style-name="TableRowCell" office:value-type="string">
            <text:p text:style-name="Table_20_Contents">XP সিস্টেম</text:p>
          </table:table-cell>
          <table:table-cell table:style-name="TableRowCell" office:value-type="string">
            <text:p text:style-name="Table_20_Contents">রক্তদানের সংখ্যার ওপর ভিত্তি করে XP</text:p>
          </table:table-cell>
        </table:table-row>
        <table:table-row>
          <table:table-cell table:style-name="TableRowCell" office:value-type="string">
            <text:p text:style-name="Table_20_Contents">র‍্যাংক সিস্টেম</text:p>
          </table:table-cell>
          <table:table-cell table:style-name="TableRowCell" office:value-type="string">
            <text:p text:style-name="Table_20_Contents">Recruit → Healer → Knight → Champion → Hero → Legend</text:p>
          </table:table-cell>
        </table:table-row>
        <table:table-row>
          <table:table-cell table:style-name="TableRowCell" office:value-type="string">
            <text:p text:style-name="Table_20_Contents">লিডারবোর্ড</text:p>
          </table:table-cell>
          <table:table-cell table:style-name="TableRowCell" office:value-type="string">
            <text:p text:style-name="Table_20_Contents">সর্বোচ্চ রক্তদানকারীদের র‍্যাংকিং</text:p>
          </table:table-cell>
        </table:table-row>
        <table:table-row>
          <table:table-cell table:style-name="TableRowCell" office:value-type="string">
            <text:p text:style-name="Table_20_Contents">রেটিং সিস্টেম</text:p>
          </table:table-cell>
          <table:table-cell table:style-name="TableRowCell" office:value-type="string">
            <text:p text:style-name="Table_20_Contents">রক্তদানের পর অন্য ব্যবহারকারীকে রেটিং দেওয়া</text:p>
          </table:table-cell>
        </table:table-row>
        <table:table-row>
          <table:table-cell table:style-name="TableRowCell" office:value-type="string">
            <text:p text:style-name="Table_20_Contents">ফিডব্যাক</text:p>
          </table:table-cell>
          <table:table-cell table:style-name="TableRowCell" office:value-type="string">
            <text:p text:style-name="Table_20_Contents">ব্যবহারকারীদের মতামত ও রিভিউ</text:p>
          </table:table-cell>
        </table:table-row>
        <table:table-row>
          <table:table-cell table:style-name="TableRowCell" office:value-type="string">
            <text:p text:style-name="Table_20_Contents">ডোনেশন লগ</text:p>
          </table:table-cell>
          <table:table-cell table:style-name="TableRowCell" office:value-type="string">
            <text:p text:style-name="Table_20_Contents">রক্তদানের ইতিহাস ট্র্যাক করা</text:p>
          </table:table-cell>
        </table:table-row>
      </table:table>
      <text:p text:style-name="Horizontal_20_Line"/>
      <text:h text:style-name="Heading_20_2" text:outline-level="2"><text:bookmark-start text:name="সসটম-বশলষণ-system-analysis"/>৬. সিস্টেম বিশ্লেষণ (System Analysis)<text:bookmark-end text:name="সসটম-বশলষণ-system-analysis"/></text:h>
      <text:h text:style-name="Heading_20_3" text:outline-level="3"><text:bookmark-start text:name="সধরণ-সগঠনক-বশলষণ"/>৬.১ সাধারণ সাংগঠনিক বিশ্লেষণ<text:bookmark-end text:name="সধরণ-সগঠনক-বশলষণ"/></text:h>
      <text:p text:style-name="First_20_paragraph">BloodDrop সিস্টেমটি তিনটি প্রধান স্তরে বিভক্ত:</text:p>
      <text:list text:style-name="L6">
        <text:list-item>
          <text:p text:style-name="P6"><text:span text:style-name="T1">প্রেজেন্টেশন স্তর (Presentation Tier):</text:span> React.js-ভিত্তিক ফ্রন্টএন্ড যা ব্যবহারকারীর সাথে ইন্টারঅ্যাক্ট করে।</text:p>
        </text:list-item>
        <text:list-item>
          <text:p text:style-name="P6"><text:span text:style-name="T1">ব্যবসায়িক যুক্তি স্তর (Business Logic Tier):</text:span> Express.js-ভিত্তিক ব্যাকএন্ড যা API রিকোয়েস্ট প্রসেস করে।</text:p>
        </text:list-item>
        <text:list-item>
          <text:p text:style-name="P6"><text:span text:style-name="T1">ডাটা স্তর (Data Tier):</text:span> MongoDB Atlas ডাটাবেস যা সকল ডেটা সংরক্ষণ করে।</text:p>
        </text:list-item>
      </text:list>
      <text:h text:style-name="Heading_20_3" text:outline-level="3"><text:bookmark-start text:name="হরডওযযর-পরযজনযত"/>৬.২ হার্ডওয়্যার প্রয়োজনীয়তা<text:bookmark-end text:name="হরডওযযর-পরযজনযত"/></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উপাদান</text:p>
            </table:table-cell>
            <table:table-cell table:style-name="TableHeaderRowCell" office:value-type="string">
              <text:p text:style-name="Table_20_Heading">ন্যূনতম</text:p>
            </table:table-cell>
            <table:table-cell table:style-name="TableHeaderRowCell" office:value-type="string">
              <text:p text:style-name="Table_20_Heading">সুপারিশ</text:p>
            </table:table-cell>
          </table:table-row>
        </table:table-header-rows>
        <table:table-row>
          <table:table-cell table:style-name="TableRowCell" office:value-type="string">
            <text:p text:style-name="Table_20_Contents">প্রসেসর</text:p>
          </table:table-cell>
          <table:table-cell table:style-name="TableRowCell" office:value-type="string">
            <text:p text:style-name="Table_20_Contents">Intel Core i3</text:p>
          </table:table-cell>
          <table:table-cell table:style-name="TableRowCell" office:value-type="string">
            <text:p text:style-name="Table_20_Contents">Intel Core i5 বা তার উপর</text:p>
          </table:table-cell>
        </table:table-row>
        <table:table-row>
          <table:table-cell table:style-name="TableRowCell" office:value-type="string">
            <text:p text:style-name="Table_20_Contents">RAM</text:p>
          </table:table-cell>
          <table:table-cell table:style-name="TableRowCell" office:value-type="string">
            <text:p text:style-name="Table_20_Contents">4 GB</text:p>
          </table:table-cell>
          <table:table-cell table:style-name="TableRowCell" office:value-type="string">
            <text:p text:style-name="Table_20_Contents">8 GB বা তার উপর</text:p>
          </table:table-cell>
        </table:table-row>
        <table:table-row>
          <table:table-cell table:style-name="TableRowCell" office:value-type="string">
            <text:p text:style-name="Table_20_Contents">স্টোরেজ</text:p>
          </table:table-cell>
          <table:table-cell table:style-name="TableRowCell" office:value-type="string">
            <text:p text:style-name="Table_20_Contents">256 GB SSD</text:p>
          </table:table-cell>
          <table:table-cell table:style-name="TableRowCell" office:value-type="string">
            <text:p text:style-name="Table_20_Contents">512 GB SSD</text:p>
          </table:table-cell>
        </table:table-row>
        <table:table-row>
          <table:table-cell table:style-name="TableRowCell" office:value-type="string">
            <text:p text:style-name="Table_20_Contents">ইন্টারনেট</text:p>
          </table:table-cell>
          <table:table-cell table:style-name="TableRowCell" office:value-type="string">
            <text:p text:style-name="Table_20_Contents">2 Mbps</text:p>
          </table:table-cell>
          <table:table-cell table:style-name="TableRowCell" office:value-type="string">
            <text:p text:style-name="Table_20_Contents">5 Mbps বা তার উপর</text:p>
          </table:table-cell>
        </table:table-row>
        <table:table-row>
          <table:table-cell table:style-name="TableRowCell" office:value-type="string">
            <text:p text:style-name="Table_20_Contents">ডিসপ্লে</text:p>
          </table:table-cell>
          <table:table-cell table:style-name="TableRowCell" office:value-type="string">
            <text:p text:style-name="Table_20_Contents">1366x768</text:p>
          </table:table-cell>
          <table:table-cell table:style-name="TableRowCell" office:value-type="string">
            <text:p text:style-name="Table_20_Contents">1920x1080 বা তার উপর</text:p>
          </table:table-cell>
        </table:table-row>
      </table:table>
      <text:h text:style-name="Heading_20_3" text:outline-level="3"><text:bookmark-start text:name="সফটওযযর-পরযজনযত"/>৬.৩ সফটওয়্যার প্রয়োজনীয়তা<text:bookmark-end text:name="সফটওযযর-পরযজনযত"/></text:h>
      <table:table table:name="Table9" table:style-name="Table9">
        <table:table-column table:style-name="Table9.A"/>
        <table:table-column table:style-name="Table9.B"/>
        <table:table-header-rows>
          <table:table-row>
            <table:table-cell table:style-name="TableHeaderRowCell" office:value-type="string">
              <text:p text:style-name="Table_20_Heading">সফটওয়্যার</text:p>
            </table:table-cell>
            <table:table-cell table:style-name="TableHeaderRowCell" office:value-type="string">
              <text:p text:style-name="Table_20_Heading">ব্যবহার</text:p>
            </table:table-cell>
          </table:table-row>
        </table:table-header-rows>
        <table:table-row>
          <table:table-cell table:style-name="TableRowCell" office:value-type="string">
            <text:p text:style-name="Table_20_Contents">Node.js (v18+)</text:p>
          </table:table-cell>
          <table:table-cell table:style-name="TableRowCell" office:value-type="string">
            <text:p text:style-name="Table_20_Contents">JavaScript রানটাইম</text:p>
          </table:table-cell>
        </table:table-row>
        <table:table-row>
          <table:table-cell table:style-name="TableRowCell" office:value-type="string">
            <text:p text:style-name="Table_20_Contents">MongoDB Atlas</text:p>
          </table:table-cell>
          <table:table-cell table:style-name="TableRowCell" office:value-type="string">
            <text:p text:style-name="Table_20_Contents">ক্লাউড ডাটাবেস</text:p>
          </table:table-cell>
        </table:table-row>
        <table:table-row>
          <table:table-cell table:style-name="TableRowCell" office:value-type="string">
            <text:p text:style-name="Table_20_Contents">Vite</text:p>
          </table:table-cell>
          <table:table-cell table:style-name="TableRowCell" office:value-type="string">
            <text:p text:style-name="Table_20_Contents">ফ্রন্টএন্ড বিল্ড টুল</text:p>
          </table:table-cell>
        </table:table-row>
        <table:table-row>
          <table:table-cell table:style-name="TableRowCell" office:value-type="string">
            <text:p text:style-name="Table_20_Contents">VS Code</text:p>
          </table:table-cell>
          <table:table-cell table:style-name="TableRowCell" office:value-type="string">
            <text:p text:style-name="Table_20_Contents">কোড এডিটর</text:p>
          </table:table-cell>
        </table:table-row>
        <table:table-row>
          <table:table-cell table:style-name="TableRowCell" office:value-type="string">
            <text:p text:style-name="Table_20_Contents">Git</text:p>
          </table:table-cell>
          <table:table-cell table:style-name="TableRowCell" office:value-type="string">
            <text:p text:style-name="Table_20_Contents">ভার্সন কন্ট্রোল</text:p>
          </table:table-cell>
        </table:table-row>
        <table:table-row>
          <table:table-cell table:style-name="TableRowCell" office:value-type="string">
            <text:p text:style-name="Table_20_Contents">Postman</text:p>
          </table:table-cell>
          <table:table-cell table:style-name="TableRowCell" office:value-type="string">
            <text:p text:style-name="Table_20_Contents">API টেস্টিং</text:p>
          </table:table-cell>
        </table:table-row>
      </table:table>
      <text:h text:style-name="Heading_20_3" text:outline-level="3"><text:bookmark-start text:name="বযবহরকরর-ধরন"/>৬.৪ ব্যবহারকারীর ধরন<text:bookmark-end text:name="বযবহরকরর-ধরন"/></text:h>
      <table:table table:name="Table10" table:style-name="Table10">
        <table:table-column table:style-name="Table10.A"/>
        <table:table-column table:style-name="Table10.B"/>
        <table:table-header-rows>
          <table:table-row>
            <table:table-cell table:style-name="TableHeaderRowCell" office:value-type="string">
              <text:p text:style-name="Table_20_Heading">ব্যবহারকারীর ধরন</text:p>
            </table:table-cell>
            <table:table-cell table:style-name="TableHeaderRowCell" office:value-type="string">
              <text:p text:style-name="Table_20_Heading">বৈশিষ্ট্য</text:p>
            </table:table-cell>
          </table:table-row>
        </table:table-header-rows>
        <table:table-row>
          <table:table-cell table:style-name="TableRowCell" office:value-type="string">
            <text:p text:style-name="Table_20_Contents">অতিথি (Guest)</text:p>
          </table:table-cell>
          <table:table-cell table:style-name="TableRowCell" office:value-type="string">
            <text:p text:style-name="Table_20_Contents">ল্যান্ডিং পেজ, ডোনার সার্চ, লিডারবোর্ড দেখতে পারে</text:p>
          </table:table-cell>
        </table:table-row>
        <table:table-row>
          <table:table-cell table:style-name="TableRowCell" office:value-type="string">
            <text:p text:style-name="Table_20_Contents">নিবন্ধিত ব্যবহারকারী</text:p>
          </table:table-cell>
          <table:table-cell table:style-name="TableRowCell" office:value-type="string">
            <text:p text:style-name="Table_20_Contents">সকল বৈশিষ্ট্য ব্যবহার করতে পারে</text:p>
          </table:table-cell>
        </table:table-row>
        <table:table-row>
          <table:table-cell table:style-name="TableRowCell" office:value-type="string">
            <text:p text:style-name="Table_20_Contents">অ্যাডমিন</text:p>
          </table:table-cell>
          <table:table-cell table:style-name="TableRowCell" office:value-type="string">
            <text:p text:style-name="Table_20_Contents">প্ল্যাটফর্ম ব্যবস্থাপনা, ব্যবহারকারী যাচাইকরণ</text:p>
          </table:table-cell>
        </table:table-row>
      </table:table>
      <text:p text:style-name="Horizontal_20_Line"/>
      <text:h text:style-name="Heading_20_2" text:outline-level="2"><text:bookmark-start text:name="সসটম-ডজইন-system-design"/>৭. সিস্টেম ডিজাইন (System Design)<text:bookmark-end text:name="সসটম-ডজইন-system-design"/></text:h>
      <text:h text:style-name="Heading_20_3" text:outline-level="3"><text:bookmark-start text:name="সসটম-আরকটকচর"/>৭.১ সিস্টেম আর্কিটেকচার<text:bookmark-end text:name="সসটম-আরকটকচর"/></text:h>
      <text:p text:style-name="P7">graph TB</text:p>
      <text:p text:style-name="P8"><text:s text:c="4"/>subgraph "ক্লায়েন্ট (React + Vite)"</text:p>
      <text:p text:style-name="P9"><text:s text:c="8"/>A[ব্রাউজার] --&gt; B[React SPA]</text:p>
      <text:p text:style-name="P10"><text:s text:c="8"/>B --&gt; C[React Router]</text:p>
      <text:p text:style-name="P11"><text:s text:c="8"/>B --&gt; D[Axios HTTP Client]</text:p>
      <text:p text:style-name="P12"><text:s text:c="8"/>B --&gt; E[Socket.IO Client]</text:p>
      <text:p text:style-name="P13"><text:s text:c="4"/>end</text:p>
      <text:p text:style-name="P14"/>
      <text:p text:style-name="P15"><text:s text:c="4"/>subgraph "সার্ভার (Express.js)"</text:p>
      <text:p text:style-name="P16"><text:s text:c="8"/>F[Express Server] --&gt; G[JWT Auth Middleware]</text:p>
      <text:p text:style-name="P17"><text:s text:c="8"/>F --&gt; H[REST API Routes]</text:p>
      <text:p text:style-name="P18"><text:s text:c="8"/>F --&gt; I[Socket.IO Server]</text:p>
      <text:p text:style-name="P19"><text:s text:c="8"/>H --&gt; J[Auth Routes]</text:p>
      <text:p text:style-name="P20"><text:s text:c="8"/>H --&gt; K[Donor Routes]</text:p>
      <text:p text:style-name="P21"><text:s text:c="8"/>H --&gt; L[Request Routes]</text:p>
      <text:p text:style-name="P22"><text:s text:c="8"/>H --&gt; M[Chat Routes]</text:p>
      <text:p text:style-name="P23"><text:s text:c="8"/>H --&gt; N[Friend Routes]</text:p>
      <text:p text:style-name="P24"><text:s text:c="4"/>end</text:p>
      <text:p text:style-name="P25"/>
      <text:p text:style-name="P26"><text:s text:c="4"/>subgraph "ডাটাবেস (MongoDB Atlas)"</text:p>
      <text:p text:style-name="P27"><text:s text:c="8"/>O[(Users)]</text:p>
      <text:p text:style-name="P28"><text:s text:c="8"/>P[(Requests)]</text:p>
      <text:p text:style-name="P29"><text:s text:c="8"/>Q[(Messages)]</text:p>
      <text:p text:style-name="P30"><text:s text:c="8"/>R[(Notifications)]</text:p>
      <text:p text:style-name="P31"><text:s text:c="8"/>S[(FriendRequests)]</text:p>
      <text:p text:style-name="P32"><text:s text:c="4"/>end</text:p>
      <text:p text:style-name="P33"/>
      <text:p text:style-name="P34"><text:s text:c="4"/>D --&gt;|HTTP/REST| F</text:p>
      <text:p text:style-name="P35"><text:s text:c="4"/>E --&gt;|WebSocket| I</text:p>
      <text:p text:style-name="P36"><text:s text:c="4"/>G --&gt; O</text:p>
      <text:p text:style-name="P37"><text:s text:c="4"/>J --&gt; O</text:p>
      <text:p text:style-name="P38"><text:s text:c="4"/>K --&gt; O</text:p>
      <text:p text:style-name="P39"><text:s text:c="4"/>L --&gt; P</text:p>
      <text:p text:style-name="P40"><text:s text:c="4"/>M --&gt; Q</text:p>
      <text:p text:style-name="P41"><text:s text:c="4"/>N --&gt; S</text:p>
      <text:p text:style-name="P42"><text:s text:c="4"/>F --&gt; R</text:p>
      <text:h text:style-name="Heading_20_3" text:outline-level="3"><text:bookmark-start text:name="ডটবস-সমপরক-চতর-er-diagram"/>৭.২ ডাটাবেস সম্পর্ক চিত্র (ER Diagram)<text:bookmark-end text:name="ডটবস-সমপরক-চতর-er-diagram"/></text:h>
      <text:p text:style-name="P43">erDiagram</text:p>
      <text:p text:style-name="P44"><text:s text:c="4"/>USER {</text:p>
      <text:p text:style-name="P45"><text:s text:c="8"/>ObjectId _id PK</text:p>
      <text:p text:style-name="P46"><text:s text:c="8"/>String name</text:p>
      <text:p text:style-name="P47"><text:s text:c="8"/>String email UK</text:p>
      <text:p text:style-name="P48"><text:s text:c="8"/>String password</text:p>
      <text:p text:style-name="P49"><text:s text:c="8"/>String phone</text:p>
      <text:p text:style-name="P50"><text:s text:c="8"/>String bloodGroup</text:p>
      <text:p text:style-name="P51"><text:s text:c="8"/>String district</text:p>
      <text:p text:style-name="P52"><text:s text:c="8"/>String area</text:p>
      <text:p text:style-name="P53"><text:s text:c="8"/>Number totalDonations</text:p>
      <text:p text:style-name="P54"><text:s text:c="8"/>Date lastDonationDate</text:p>
      <text:p text:style-name="P55"><text:s text:c="8"/>Boolean isVerified</text:p>
      <text:p text:style-name="P56"><text:s text:c="8"/>Boolean isActive</text:p>
      <text:p text:style-name="P57"><text:s text:c="4"/>}</text:p>
      <text:p text:style-name="P58"/>
      <text:p text:style-name="P59"><text:s text:c="4"/>REQUEST {</text:p>
      <text:p text:style-name="P60"><text:s text:c="8"/>ObjectId _id PK</text:p>
      <text:p text:style-name="P61"><text:s text:c="8"/>String patientName</text:p>
      <text:p text:style-name="P62"><text:s text:c="8"/>String hospital</text:p>
      <text:p text:style-name="P63"><text:s text:c="8"/>String patientBloodGroup</text:p>
      <text:p text:style-name="P64"><text:s text:c="8"/>Number unitsRequired</text:p>
      <text:p text:style-name="P65"><text:s text:c="8"/>String urgency</text:p>
      <text:p text:style-name="P66"><text:s text:c="8"/>String status</text:p>
      <text:p text:style-name="P67"><text:s text:c="8"/>ObjectId requester FK</text:p>
      <text:p text:style-name="P68"><text:s text:c="8"/>ObjectId acceptedBy FK</text:p>
      <text:p text:style-name="P69"><text:s text:c="4"/>}</text:p>
      <text:p text:style-name="P70"/>
      <text:p text:style-name="P71"><text:s text:c="4"/>MESSAGE {</text:p>
      <text:p text:style-name="P72"><text:s text:c="8"/>ObjectId _id PK</text:p>
      <text:p text:style-name="P73"><text:s text:c="8"/>ObjectId conversationId FK</text:p>
      <text:p text:style-name="P74"><text:s text:c="8"/>ObjectId senderId FK</text:p>
      <text:p text:style-name="P75"><text:s text:c="8"/>ObjectId receiverId FK</text:p>
      <text:p text:style-name="P76"><text:s text:c="8"/>String text</text:p>
      <text:p text:style-name="P77"><text:s text:c="8"/>Boolean seen</text:p>
      <text:p text:style-name="P78"><text:s text:c="4"/>}</text:p>
      <text:p text:style-name="P79"/>
      <text:p text:style-name="P80"><text:s text:c="4"/>CONVERSATION {</text:p>
      <text:p text:style-name="P81"><text:s text:c="8"/>ObjectId _id PK</text:p>
      <text:p text:style-name="P82"><text:s text:c="8"/>Array participants FK</text:p>
      <text:p text:style-name="P83"><text:s text:c="8"/>Object lastMessage</text:p>
      <text:p text:style-name="P84"><text:s text:c="8"/>Map unreadCount</text:p>
      <text:p text:style-name="P85"><text:s text:c="4"/>}</text:p>
      <text:p text:style-name="P86"/>
      <text:p text:style-name="P87"><text:s text:c="4"/>NOTIFICATION {</text:p>
      <text:p text:style-name="P88"><text:s text:c="8"/>ObjectId _id PK</text:p>
      <text:p text:style-name="P89"><text:s text:c="8"/>ObjectId userId FK</text:p>
      <text:p text:style-name="P90"><text:s text:c="8"/>String type</text:p>
      <text:p text:style-name="P91"><text:s text:c="8"/>String title</text:p>
      <text:p text:style-name="P92"><text:s text:c="8"/>String message</text:p>
      <text:p text:style-name="P93"><text:s text:c="8"/>Boolean isRead</text:p>
      <text:p text:style-name="P94"><text:s text:c="4"/>}</text:p>
      <text:p text:style-name="P95"/>
      <text:p text:style-name="P96"><text:s text:c="4"/>FRIEND_REQUEST {</text:p>
      <text:p text:style-name="P97"><text:s text:c="8"/>ObjectId _id PK</text:p>
      <text:p text:style-name="P98"><text:s text:c="8"/>ObjectId sender FK</text:p>
      <text:p text:style-name="P99"><text:s text:c="8"/>ObjectId receiver FK</text:p>
      <text:p text:style-name="P100"><text:s text:c="8"/>String status</text:p>
      <text:p text:style-name="P101"><text:s text:c="4"/>}</text:p>
      <text:p text:style-name="P102"/>
      <text:p text:style-name="P103"><text:s text:c="4"/>DONATION_LOG {</text:p>
      <text:p text:style-name="P104"><text:s text:c="8"/>ObjectId _id PK</text:p>
      <text:p text:style-name="P105"><text:s text:c="8"/>ObjectId userId FK</text:p>
      <text:p text:style-name="P106"><text:s text:c="8"/>String userName</text:p>
      <text:p text:style-name="P107"><text:s text:c="8"/>Date donationDate</text:p>
      <text:p text:style-name="P108"><text:s text:c="8"/>String hospital</text:p>
      <text:p text:style-name="P109"><text:s text:c="8"/>String bloodGroup</text:p>
      <text:p text:style-name="P110"><text:s text:c="4"/>}</text:p>
      <text:p text:style-name="P111"/>
      <text:p text:style-name="P112"><text:s text:c="4"/>BOOKMARK {</text:p>
      <text:p text:style-name="P113"><text:s text:c="8"/>ObjectId _id PK</text:p>
      <text:p text:style-name="P114"><text:s text:c="8"/>ObjectId userId FK</text:p>
      <text:p text:style-name="P115"><text:s text:c="8"/>ObjectId donorId FK</text:p>
      <text:p text:style-name="P116"><text:s text:c="4"/>}</text:p>
      <text:p text:style-name="P117"/>
      <text:p text:style-name="P118"><text:s text:c="4"/>FEEDBACK {</text:p>
      <text:p text:style-name="P119"><text:s text:c="8"/>ObjectId _id PK</text:p>
      <text:p text:style-name="P120"><text:s text:c="8"/>ObjectId userId FK</text:p>
      <text:p text:style-name="P121"><text:s text:c="8"/>Number rating</text:p>
      <text:p text:style-name="P122"><text:s text:c="8"/>String comment</text:p>
      <text:p text:style-name="P123"><text:s text:c="4"/>}</text:p>
      <text:p text:style-name="P124"/>
      <text:p text:style-name="P125"><text:s text:c="4"/>RATING {</text:p>
      <text:p text:style-name="P126"><text:s text:c="8"/>ObjectId _id PK</text:p>
      <text:p text:style-name="P127"><text:s text:c="8"/>ObjectId requestId FK</text:p>
      <text:p text:style-name="P128"><text:s text:c="8"/>ObjectId raterId FK</text:p>
      <text:p text:style-name="P129"><text:s text:c="8"/>ObjectId ratedUserId FK</text:p>
      <text:p text:style-name="P130"><text:s text:c="8"/>Number rating</text:p>
      <text:p text:style-name="P131"><text:s text:c="4"/>}</text:p>
      <text:p text:style-name="P132"/>
      <text:p text:style-name="P133"><text:s text:c="4"/>USER ||--o{ REQUEST : "creates"</text:p>
      <text:p text:style-name="P134"><text:s text:c="4"/>USER ||--o{ REQUEST : "accepts"</text:p>
      <text:p text:style-name="P135"><text:s text:c="4"/>USER ||--o{ CONVERSATION : "participates"</text:p>
      <text:p text:style-name="P136"><text:s text:c="4"/>CONVERSATION ||--o{ MESSAGE : "contains"</text:p>
      <text:p text:style-name="P137"><text:s text:c="4"/>USER ||--o{ NOTIFICATION : "receives"</text:p>
      <text:p text:style-name="P138"><text:s text:c="4"/>USER ||--o{ FRIEND_REQUEST : "sends"</text:p>
      <text:p text:style-name="P139"><text:s text:c="4"/>USER ||--o{ FRIEND_REQUEST : "receives"</text:p>
      <text:p text:style-name="P140"><text:s text:c="4"/>USER ||--o{ DONATION_LOG : "has"</text:p>
      <text:p text:style-name="P141"><text:s text:c="4"/>USER ||--o{ BOOKMARK : "creates"</text:p>
      <text:p text:style-name="P142"><text:s text:c="4"/>USER ||--o{ FEEDBACK : "writes"</text:p>
      <text:p text:style-name="P143"><text:s text:c="4"/>USER ||--o{ RATING : "rates"</text:p>
      <text:h text:style-name="Heading_20_3" text:outline-level="3"><text:bookmark-start text:name="অথনটকশন-ফল"/>৭.৩ অথেনটিকেশন ফ্লো<text:bookmark-end text:name="অথনটকশন-ফল"/></text:h>
      <text:p text:style-name="P144">sequenceDiagram</text:p>
      <text:p text:style-name="P145"><text:s text:c="4"/>participant B as ব্রাউজার</text:p>
      <text:p text:style-name="P146"><text:s text:c="4"/>participant C as React Client</text:p>
      <text:p text:style-name="P147"><text:s text:c="4"/>participant S as Express Server</text:p>
      <text:p text:style-name="P148"><text:s text:c="4"/>participant D as MongoDB</text:p>
      <text:p text:style-name="P149"/>
      <text:p text:style-name="P150"><text:s text:c="4"/>B-&gt;&gt;C: লগইন ফর্ম সাবমিট</text:p>
      <text:p text:style-name="P151"><text:s text:c="4"/>C-&gt;&gt;S: POST /api/auth/login</text:p>
      <text:p text:style-name="P152"><text:s text:c="4"/>S-&gt;&gt;D: User.findOne({email})</text:p>
      <text:p text:style-name="P153"><text:s text:c="4"/>D--&gt;&gt;S: ব্যবহারকারীর তথ্য</text:p>
      <text:p text:style-name="P154"><text:s text:c="4"/>S-&gt;&gt;S: bcrypt.compare(password)</text:p>
      <text:p text:style-name="P155"><text:s text:c="4"/>S-&gt;&gt;S: jwt.sign({id}, secret)</text:p>
      <text:p text:style-name="P156"><text:s text:c="4"/>S--&gt;&gt;C: {token, user}</text:p>
      <text:p text:style-name="P157"><text:s text:c="4"/>C-&gt;&gt;C: localStorage.save(token)</text:p>
      <text:p text:style-name="P158"><text:s text:c="4"/>C--&gt;&gt;B: ড্যাশবোর্ডে রিডাইরেক্ট</text:p>
      <text:p text:style-name="P159"/>
      <text:p text:style-name="P160"><text:s text:c="4"/>Note over B,D: সুরক্ষিত রুট অ্যাক্সেস</text:p>
      <text:p text:style-name="P161"/>
      <text:p text:style-name="P162"><text:s text:c="4"/>C-&gt;&gt;S: GET /api/requests (with token)</text:p>
      <text:p text:style-name="P163"><text:s text:c="4"/>S-&gt;&gt;S: jwt.verify(token)</text:p>
      <text:p text:style-name="P164"><text:s text:c="4"/>S-&gt;&gt;S: req.user = decoded user</text:p>
      <text:p text:style-name="P165"><text:s text:c="4"/>S-&gt;&gt;D: Request.find()</text:p>
      <text:p text:style-name="P166"><text:s text:c="4"/>D--&gt;&gt;S: অনুরোধের তথ্য</text:p>
      <text:p text:style-name="P167"><text:s text:c="4"/>S--&gt;&gt;C: {requests}</text:p>
      <text:h text:style-name="Heading_20_3" text:outline-level="3"><text:bookmark-start text:name="রকতর-অনরধ-জবনচকর"/>৭.৪ রক্তের অনুরোধ জীবনচক্র<text:bookmark-end text:name="রকতর-অনরধ-জবনচকর"/></text:h>
      <text:p text:style-name="P168">stateDiagram-v2</text:p>
      <text:p text:style-name="P169"><text:s text:c="4"/>[*] --&gt; Open: অনুরোধ তৈরি</text:p>
      <text:p text:style-name="P170"><text:s text:c="4"/>Open --&gt; Accepted: রক্তদাতা গ্রহণ করে</text:p>
      <text:p text:style-name="P171"><text:s text:c="4"/>Open --&gt; Cancelled: অনুরোধকারী বাতিল করে</text:p>
      <text:p text:style-name="P172"><text:s text:c="4"/>Accepted --&gt; Completed: রক্তদান সম্পূর্ণ</text:p>
      <text:p text:style-name="P173"><text:s text:c="4"/>Accepted --&gt; Open: রক্তদাতা বাতিল করে</text:p>
      <text:p text:style-name="P174"><text:s text:c="4"/>Completed --&gt; [*]</text:p>
      <text:p text:style-name="P175"><text:s text:c="4"/>Cancelled --&gt; [*]</text:p>
      <text:h text:style-name="Heading_20_3" text:outline-level="3"><text:bookmark-start text:name="রযল-টইম-চযট-আরকটকচর"/>৭.৫ রিয়েল-টাইম চ্যাট আর্কিটেকচার<text:bookmark-end text:name="রযল-টইম-চযট-আরকটকচর"/></text:h>
      <text:p text:style-name="P176">graph LR</text:p>
      <text:p text:style-name="P177"><text:s text:c="4"/>A[ব্যবহারকারী A] --&gt;|Socket.IO| B[Server]</text:p>
      <text:p text:style-name="P178"><text:s text:c="4"/>B --&gt;|Socket.IO| C[ব্যবহারকারী B]</text:p>
      <text:p text:style-name="P179"><text:s text:c="4"/>B --&gt; D[(Messages DB)]</text:p>
      <text:p text:style-name="P180"><text:s text:c="4"/>B --&gt; E[(Conversations DB)]</text:p>
      <text:p text:style-name="P181"><text:s text:c="4"/></text:p>
      <text:p text:style-name="P182"><text:s text:c="4"/>F[Event: message:send] --&gt; B</text:p>
      <text:p text:style-name="P183"><text:s text:c="4"/>G[Event: typing:start] --&gt; B</text:p>
      <text:p text:style-name="P184"><text:s text:c="4"/>H[Event: message:seen] --&gt; B</text:p>
      <text:p text:style-name="P185"><text:s text:c="4"/></text:p>
      <text:p text:style-name="P186"><text:s text:c="4"/>B --&gt; I[Event: message:received]</text:p>
      <text:p text:style-name="P187"><text:s text:c="4"/>B --&gt; J[Event: typing:stop]</text:p>
      <text:p text:style-name="Horizontal_20_Line"/>
      <text:h text:style-name="Heading_20_2" text:outline-level="2"><text:bookmark-start text:name="বযবহত-পরযকত-technologies-used"/>৮. ব্যবহৃত প্রযুক্তি (Technologies Used)<text:bookmark-end text:name="বযবহত-পরযকত-technologies-used"/></text:h>
      <text:h text:style-name="Heading_20_3" text:outline-level="3"><text:bookmark-start text:name="পরযকত-তলক"/>৮.১ প্রযুক্তি তালিকা<text:bookmark-end text:name="পরযকত-তলক"/></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ক্রমিক</text:p>
            </table:table-cell>
            <table:table-cell table:style-name="TableHeaderRowCell" office:value-type="string">
              <text:p text:style-name="Table_20_Heading">প্রযুক্তি</text:p>
            </table:table-cell>
            <table:table-cell table:style-name="TableHeaderRowCell" office:value-type="string">
              <text:p text:style-name="Table_20_Heading">সংস্করণ</text:p>
            </table:table-cell>
            <table:table-cell table:style-name="TableHeaderRowCell" office:value-type="string">
              <text:p text:style-name="Table_20_Heading">ব্যবহার</text:p>
            </table:table-cell>
          </table:table-row>
        </table:table-header-rows>
        <table:table-row>
          <table:table-cell table:style-name="TableRowCell" office:value-type="string">
            <text:p text:style-name="Table_20_Contents">১</text:p>
          </table:table-cell>
          <table:table-cell table:style-name="TableRowCell" office:value-type="string">
            <text:p text:style-name="Table_20_Contents">React.js</text:p>
          </table:table-cell>
          <table:table-cell table:style-name="TableRowCell" office:value-type="string">
            <text:p text:style-name="Table_20_Contents">19.2.7</text:p>
          </table:table-cell>
          <table:table-cell table:style-name="TableRowCell" office:value-type="string">
            <text:p text:style-name="Table_20_Contents">ফ্রন্টএন্ড UI ফ্রেমওয়ার্ক</text:p>
          </table:table-cell>
        </table:table-row>
        <table:table-row>
          <table:table-cell table:style-name="TableRowCell" office:value-type="string">
            <text:p text:style-name="Table_20_Contents">২</text:p>
          </table:table-cell>
          <table:table-cell table:style-name="TableRowCell" office:value-type="string">
            <text:p text:style-name="Table_20_Contents">Vite</text:p>
          </table:table-cell>
          <table:table-cell table:style-name="TableRowCell" office:value-type="string">
            <text:p text:style-name="Table_20_Contents">8.1.1</text:p>
          </table:table-cell>
          <table:table-cell table:style-name="TableRowCell" office:value-type="string">
            <text:p text:style-name="Table_20_Contents">বিল্ড টুল ও ডেভেলপমেন্ট সার্ভার</text:p>
          </table:table-cell>
        </table:table-row>
        <table:table-row>
          <table:table-cell table:style-name="TableRowCell" office:value-type="string">
            <text:p text:style-name="Table_20_Contents">৩</text:p>
          </table:table-cell>
          <table:table-cell table:style-name="TableRowCell" office:value-type="string">
            <text:p text:style-name="Table_20_Contents">React Router</text:p>
          </table:table-cell>
          <table:table-cell table:style-name="TableRowCell" office:value-type="string">
            <text:p text:style-name="Table_20_Contents">7.18.1</text:p>
          </table:table-cell>
          <table:table-cell table:style-name="TableRowCell" office:value-type="string">
            <text:p text:style-name="Table_20_Contents">ক্লায়েন্ট-সাইড রাউটিং</text:p>
          </table:table-cell>
        </table:table-row>
        <table:table-row>
          <table:table-cell table:style-name="TableRowCell" office:value-type="string">
            <text:p text:style-name="Table_20_Contents">৪</text:p>
          </table:table-cell>
          <table:table-cell table:style-name="TableRowCell" office:value-type="string">
            <text:p text:style-name="Table_20_Contents">Axios</text:p>
          </table:table-cell>
          <table:table-cell table:style-name="TableRowCell" office:value-type="string">
            <text:p text:style-name="Table_20_Contents">1.18.1</text:p>
          </table:table-cell>
          <table:table-cell table:style-name="TableRowCell" office:value-type="string">
            <text:p text:style-name="Table_20_Contents">HTTP ক্লায়েন্ট</text:p>
          </table:table-cell>
        </table:table-row>
        <table:table-row>
          <table:table-cell table:style-name="TableRowCell" office:value-type="string">
            <text:p text:style-name="Table_20_Contents">৫</text:p>
          </table:table-cell>
          <table:table-cell table:style-name="TableRowCell" office:value-type="string">
            <text:p text:style-name="Table_20_Contents">Socket.IO Client</text:p>
          </table:table-cell>
          <table:table-cell table:style-name="TableRowCell" office:value-type="string">
            <text:p text:style-name="Table_20_Contents">4.8.3</text:p>
          </table:table-cell>
          <table:table-cell table:style-name="TableRowCell" office:value-type="string">
            <text:p text:style-name="Table_20_Contents">WebSocket ক্লায়েন্ট</text:p>
          </table:table-cell>
        </table:table-row>
        <table:table-row>
          <table:table-cell table:style-name="TableRowCell" office:value-type="string">
            <text:p text:style-name="Table_20_Contents">৬</text:p>
          </table:table-cell>
          <table:table-cell table:style-name="TableRowCell" office:value-type="string">
            <text:p text:style-name="Table_20_Contents">React Query</text:p>
          </table:table-cell>
          <table:table-cell table:style-name="TableRowCell" office:value-type="string">
            <text:p text:style-name="Table_20_Contents">5.101.2</text:p>
          </table:table-cell>
          <table:table-cell table:style-name="TableRowCell" office:value-type="string">
            <text:p text:style-name="Table_20_Contents">সার্ভার স্টেট ক্যাশিং</text:p>
          </table:table-cell>
        </table:table-row>
        <table:table-row>
          <table:table-cell table:style-name="TableRowCell" office:value-type="string">
            <text:p text:style-name="Table_20_Contents">৭</text:p>
          </table:table-cell>
          <table:table-cell table:style-name="TableRowCell" office:value-type="string">
            <text:p text:style-name="Table_20_Contents">React Hot Toast</text:p>
          </table:table-cell>
          <table:table-cell table:style-name="TableRowCell" office:value-type="string">
            <text:p text:style-name="Table_20_Contents">2.6.0</text:p>
          </table:table-cell>
          <table:table-cell table:style-name="TableRowCell" office:value-type="string">
            <text:p text:style-name="Table_20_Contents">টোস্ট নোটিফিকেশন</text:p>
          </table:table-cell>
        </table:table-row>
        <table:table-row>
          <table:table-cell table:style-name="TableRowCell" office:value-type="string">
            <text:p text:style-name="Table_20_Contents">৮</text:p>
          </table:table-cell>
          <table:table-cell table:style-name="TableRowCell" office:value-type="string">
            <text:p text:style-name="Table_20_Contents">Lucide React</text:p>
          </table:table-cell>
          <table:table-cell table:style-name="TableRowCell" office:value-type="string">
            <text:p text:style-name="Table_20_Contents">1.23.0</text:p>
          </table:table-cell>
          <table:table-cell table:style-name="TableRowCell" office:value-type="string">
            <text:p text:style-name="Table_20_Contents">আইকন লাইব্রেরি</text:p>
          </table:table-cell>
        </table:table-row>
        <table:table-row>
          <table:table-cell table:style-name="TableRowCell" office:value-type="string">
            <text:p text:style-name="Table_20_Contents">৯</text:p>
          </table:table-cell>
          <table:table-cell table:style-name="TableRowCell" office:value-type="string">
            <text:p text:style-name="Table_20_Contents">Express.js</text:p>
          </table:table-cell>
          <table:table-cell table:style-name="TableRowCell" office:value-type="string">
            <text:p text:style-name="Table_20_Contents">4.21.2</text:p>
          </table:table-cell>
          <table:table-cell table:style-name="TableRowCell" office:value-type="string">
            <text:p text:style-name="Table_20_Contents">ব্যাকএন্ড ফ্রেমওয়ার্ক</text:p>
          </table:table-cell>
        </table:table-row>
        <table:table-row>
          <table:table-cell table:style-name="TableRowCell" office:value-type="string">
            <text:p text:style-name="Table_20_Contents">১০</text:p>
          </table:table-cell>
          <table:table-cell table:style-name="TableRowCell" office:value-type="string">
            <text:p text:style-name="Table_20_Contents">Mongoose</text:p>
          </table:table-cell>
          <table:table-cell table:style-name="TableRowCell" office:value-type="string">
            <text:p text:style-name="Table_20_Contents">8.9.5</text:p>
          </table:table-cell>
          <table:table-cell table:style-name="TableRowCell" office:value-type="string">
            <text:p text:style-name="Table_20_Contents">MongoDB ODM</text:p>
          </table:table-cell>
        </table:table-row>
        <table:table-row>
          <table:table-cell table:style-name="TableRowCell" office:value-type="string">
            <text:p text:style-name="Table_20_Contents">১১</text:p>
          </table:table-cell>
          <table:table-cell table:style-name="TableRowCell" office:value-type="string">
            <text:p text:style-name="Table_20_Contents">Socket.IO</text:p>
          </table:table-cell>
          <table:table-cell table:style-name="TableRowCell" office:value-type="string">
            <text:p text:style-name="Table_20_Contents">4.8.3</text:p>
          </table:table-cell>
          <table:table-cell table:style-name="TableRowCell" office:value-type="string">
            <text:p text:style-name="Table_20_Contents">WebSocket সার্ভার</text:p>
          </table:table-cell>
        </table:table-row>
        <table:table-row>
          <table:table-cell table:style-name="TableRowCell" office:value-type="string">
            <text:p text:style-name="Table_20_Contents">১২</text:p>
          </table:table-cell>
          <table:table-cell table:style-name="TableRowCell" office:value-type="string">
            <text:p text:style-name="Table_20_Contents">jsonwebtoken</text:p>
          </table:table-cell>
          <table:table-cell table:style-name="TableRowCell" office:value-type="string">
            <text:p text:style-name="Table_20_Contents">9.0.2</text:p>
          </table:table-cell>
          <table:table-cell table:style-name="TableRowCell" office:value-type="string">
            <text:p text:style-name="Table_20_Contents">JWT অথেনটিকেশন</text:p>
          </table:table-cell>
        </table:table-row>
        <table:table-row>
          <table:table-cell table:style-name="TableRowCell" office:value-type="string">
            <text:p text:style-name="Table_20_Contents">১৩</text:p>
          </table:table-cell>
          <table:table-cell table:style-name="TableRowCell" office:value-type="string">
            <text:p text:style-name="Table_20_Contents">bcryptjs</text:p>
          </table:table-cell>
          <table:table-cell table:style-name="TableRowCell" office:value-type="string">
            <text:p text:style-name="Table_20_Contents">3.0.3</text:p>
          </table:table-cell>
          <table:table-cell table:style-name="TableRowCell" office:value-type="string">
            <text:p text:style-name="Table_20_Contents">পাসওয়ার্ড হ্যাশিং</text:p>
          </table:table-cell>
        </table:table-row>
        <table:table-row>
          <table:table-cell table:style-name="TableRowCell" office:value-type="string">
            <text:p text:style-name="Table_20_Contents">১৪</text:p>
          </table:table-cell>
          <table:table-cell table:style-name="TableRowCell" office:value-type="string">
            <text:p text:style-name="Table_20_Contents">Helmet</text:p>
          </table:table-cell>
          <table:table-cell table:style-name="TableRowCell" office:value-type="string">
            <text:p text:style-name="Table_20_Contents">8.0.0</text:p>
          </table:table-cell>
          <table:table-cell table:style-name="TableRowCell" office:value-type="string">
            <text:p text:style-name="Table_20_Contents">HTTP সুরক্ষা হেডার</text:p>
          </table:table-cell>
        </table:table-row>
        <table:table-row>
          <table:table-cell table:style-name="TableRowCell" office:value-type="string">
            <text:p text:style-name="Table_20_Contents">১৫</text:p>
          </table:table-cell>
          <table:table-cell table:style-name="TableRowCell" office:value-type="string">
            <text:p text:style-name="Table_20_Contents">CORS</text:p>
          </table:table-cell>
          <table:table-cell table:style-name="TableRowCell" office:value-type="string">
            <text:p text:style-name="Table_20_Contents">2.8.5</text:p>
          </table:table-cell>
          <table:table-cell table:style-name="TableRowCell" office:value-type="string">
            <text:p text:style-name="Table_20_Contents">Cross-Origin রিসোর্স শেয়ারিং</text:p>
          </table:table-cell>
        </table:table-row>
        <table:table-row>
          <table:table-cell table:style-name="TableRowCell" office:value-type="string">
            <text:p text:style-name="Table_20_Contents">১৬</text:p>
          </table:table-cell>
          <table:table-cell table:style-name="TableRowCell" office:value-type="string">
            <text:p text:style-name="Table_20_Contents">Resend</text:p>
          </table:table-cell>
          <table:table-cell table:style-name="TableRowCell" office:value-type="string">
            <text:p text:style-name="Table_20_Contents">6.17.2</text:p>
          </table:table-cell>
          <table:table-cell table:style-name="TableRowCell" office:value-type="string">
            <text:p text:style-name="Table_20_Contents">ইমেইল পাঠানো</text:p>
          </table:table-cell>
        </table:table-row>
        <table:table-row>
          <table:table-cell table:style-name="TableRowCell" office:value-type="string">
            <text:p text:style-name="Table_20_Contents">১৭</text:p>
          </table:table-cell>
          <table:table-cell table:style-name="TableRowCell" office:value-type="string">
            <text:p text:style-name="Table_20_Contents">MongoDB Atlas</text:p>
          </table:table-cell>
          <table:table-cell table:style-name="TableRowCell" office:value-type="string">
            <text:p text:style-name="Table_20_Contents">M0 (Free)</text:p>
          </table:table-cell>
          <table:table-cell table:style-name="TableRowCell" office:value-type="string">
            <text:p text:style-name="Table_20_Contents">ক্লাউড ডাটাবেস</text:p>
          </table:table-cell>
        </table:table-row>
        <table:table-row>
          <table:table-cell table:style-name="TableRowCell" office:value-type="string">
            <text:p text:style-name="Table_20_Contents">১৮</text:p>
          </table:table-cell>
          <table:table-cell table:style-name="TableRowCell" office:value-type="string">
            <text:p text:style-name="Table_20_Contents">Vercel</text:p>
          </table:table-cell>
          <table:table-cell table:style-name="TableRowCell" office:value-type="string">
            <text:p text:style-name="Table_20_Contents">-</text:p>
          </table:table-cell>
          <table:table-cell table:style-name="TableRowCell" office:value-type="string">
            <text:p text:style-name="Table_20_Contents">ফ্রন্টএন্ড হোস্টিং</text:p>
          </table:table-cell>
        </table:table-row>
        <table:table-row>
          <table:table-cell table:style-name="TableRowCell" office:value-type="string">
            <text:p text:style-name="Table_20_Contents">১৯</text:p>
          </table:table-cell>
          <table:table-cell table:style-name="TableRowCell" office:value-type="string">
            <text:p text:style-name="Table_20_Contents">Render</text:p>
          </table:table-cell>
          <table:table-cell table:style-name="TableRowCell" office:value-type="string">
            <text:p text:style-name="Table_20_Contents">-</text:p>
          </table:table-cell>
          <table:table-cell table:style-name="TableRowCell" office:value-type="string">
            <text:p text:style-name="Table_20_Contents">ব্যাকএন্ড হোস্টিং</text:p>
          </table:table-cell>
        </table:table-row>
        <table:table-row>
          <table:table-cell table:style-name="TableRowCell" office:value-type="string">
            <text:p text:style-name="Table_20_Contents">২০</text:p>
          </table:table-cell>
          <table:table-cell table:style-name="TableRowCell" office:value-type="string">
            <text:p text:style-name="Table_20_Contents">Tailwind CSS</text:p>
          </table:table-cell>
          <table:table-cell table:style-name="TableRowCell" office:value-type="string">
            <text:p text:style-name="Table_20_Contents">-</text:p>
          </table:table-cell>
          <table:table-cell table:style-name="TableRowCell" office:value-type="string">
            <text:p text:style-name="Table_20_Contents">ইউটিলিটি-ফার্স্ট CSS</text:p>
          </table:table-cell>
        </table:table-row>
      </table:table>
      <text:h text:style-name="Heading_20_3" text:outline-level="3"><text:bookmark-start text:name="পরযকত-নরবচনর-যকত"/>৮.২ প্রযুক্তি নির্বাচনের যুক্তি<text:bookmark-end text:name="পরযকত-নরবচনর-যকত"/></text:h>
      <text:p text:style-name="First_20_paragraph"><text:span text:style-name="T1">React.js:</text:span> কম্পোনেন্ট-ভিত্তিক আর্কিটেকচার, বড় ইকোসিস্টেম, এবং ডেভেলপার কমিউনিটির সমর্থন। ভার্চুয়াল DOM ব্যবহার করে হাই পারফর্ম্যান্স UI তৈরি করে।</text:p>
      <text:p text:style-name="Text_20_body"><text:span text:style-name="T1">Express.js:</text:span> সহজ ও নমনীয় মাইক্রো-ফ্রেমওয়ার্ক। middleware সিস্টেমের মাধ্যমে সুরক্ষা, ভ্যালিডেশন ও এরর হ্যান্ডলিং সহজে বাস্তবায়ন করা যায়।</text:p>
      <text:p text:style-name="Text_20_body"><text:span text:style-name="T1">MongoDB Atlas:</text:span> NoSQL ডাটাবেস যা ফ্লেক্সিবল স্কিমা প্রদান করে। ক্লাউড-হোস্টেড হওয়ায় সার্ভার ম্যানেজমেন্টের প্রয়োজন নেই।</text:p>
      <text:p text:style-name="Text_20_body"><text:span text:style-name="T1">Socket.IO:</text:span> রিয়েল-টাইম দ্বিমুখী যোগাযোগের জন্য। WebSocket-এর উপর অটোমেটিক ফলব্যাক সহ।</text:p>
      <text:p text:style-name="Text_20_body"><text:span text:style-name="T1">Vite:</text:span> দ্রুত HMR (Hot Module Replacement) এবং অপ্টিমাইজড বিল্ড।</text:p>
      <text:p text:style-name="Horizontal_20_Line"/>
      <text:h text:style-name="Heading_20_2" text:outline-level="2"><text:bookmark-start text:name="বসতবযন-ববরণ-implementation-details"/>৯. বাস্তবায়ন বিবরণ (Implementation Details)<text:bookmark-end text:name="বসতবযন-ববরণ-implementation-details"/></text:h>
      <text:h text:style-name="Heading_20_3" text:outline-level="3"><text:bookmark-start text:name="লযনড-পজ-landing-page"/>৯.১ ল্যান্ডিং পেজ (Landing Page)<text:bookmark-end text:name="লযনড-পজ-landing-page"/></text:h>
      <text:p text:style-name="First_20_paragraph"><text:span text:style-name="T1">পাথ:</text:span> <text:span text:style-name="Source_Text">/</text:span></text:p>
      <text:p text:style-name="Text_20_body">ল্যান্ডিং পেজটি সিস্টেমের প্রথম পৃষ্ঠা যা ব্যবহারকারীদের সিস্টেম পরিচিত করে। এতে অন্তর্ভুক্ত রয়েছে:</text:p>
      <text:list text:style-name="L7">
        <text:list-item>
          <text:p text:style-name="P188"><text:span text:style-name="T1">হিরো সেকশন:</text:span> অটো-রোটেটিং ৪টি ব্যানার ইমেজ</text:p>
        </text:list-item>
        <text:list-item>
          <text:p text:style-name="P188"><text:span text:style-name="T1">স্ট্যাটস কাউন্টার:</text:span> API থেকে রিয়েল স্ট্যাটস (মোট ব্যবহারকারী, রক্তদান, অনুরোধ)</text:p>
        </text:list-item>
        <text:list-item>
          <text:p text:style-name="P188"><text:span text:style-name="T1">কিভাবে কাজ করে:</text:span> ৩টি ধাপের কার্ড (নিবন্ধন → খুঁজুন → রক্তদান করুন)</text:p>
        </text:list-item>
        <text:list-item>
          <text:p text:style-name="P188"><text:span text:style-name="T1">রক্তের ধরন কম্প্যাটিবিলিটি চার্ট:</text:span> ৮x৮ ইন্টারেক্টিভ ম্যাট্রিক্স</text:p>
        </text:list-item>
        <text:list-item>
          <text:p text:style-name="P188"><text:span text:style-name="T1">বৈশিষ্ট্য কার্ড:</text:span> ৬টি ফিচার কার্ড ৩D ইফেক্ট সহ</text:p>
        </text:list-item>
        <text:list-item>
          <text:p text:style-name="P188"><text:span text:style-name="T1">প্রশংসাপত্র:</text:span> ব্যবহারকারীদের রিভিউ</text:p>
        </text:list-item>
        <text:list-item>
          <text:p text:style-name="P188"><text:span text:style-name="T1">FAQ:</text:span> সচরাচর জিজ্ঞাসা</text:p>
        </text:list-item>
      </text:list>
      <text:p text:style-name="Preformatted_20_Text">
<text:span text:style-name="CommentTok">// ল্যান্ডিং পেজের রক্তের ধরন কম্প্যাটিবিলিটি ম্যাট্রিক্স</text:span>
</text:p>
      <text:p text:style-name="Preformatted_20_Text">
<text:span text:style-name="KeywordTok">const</text:span><text:span text:style-name="NormalTok"><text:s text:c="1"/>COMPATIBILITY </text:span><text:span text:style-name="OperatorTok">=</text:span><text:span text:style-name="NormalTok"><text:s text:c="1"/>{</text:span>
</text:p>
      <text:p text:style-name="Preformatted_20_Text">
<text:span text:style-name="NormalTok"><text:s text:c="2"/></text:span><text:span text:style-name="StringTok">"O-"</text:span><text:span text:style-name="OperatorTok">:</text:span><text:span text:style-name="NormalTok"><text:s text:c="2"/>{ </text:span><text:span text:style-name="DataTypeTok">donateTo</text:span><text:span text:style-name="OperatorTok">:</text:span><text:span text:style-name="NormalTok"><text:s text:c="1"/>[</text:span><text:span text:style-name="StringTok">"O-"</text:span><text:span text:style-name="OperatorTok">,</text:span><text:span text:style-name="StringTok">"O+"</text:span><text:span text:style-name="OperatorTok">,</text:span><text:span text:style-name="StringTok">"A-"</text:span><text:span text:style-name="OperatorTok">,</text:span><text:span text:style-name="StringTok">"A+"</text:span><text:span text:style-name="OperatorTok">,</text:span><text:span text:style-name="StringTok">"B-"</text:span><text:span text:style-name="OperatorTok">,</text:span><text:span text:style-name="StringTok">"B+"</text:span><text:span text:style-name="OperatorTok">,</text:span><text:span text:style-name="StringTok">"AB-"</text:span><text:span text:style-name="OperatorTok">,</text:span><text:span text:style-name="StringTok">"AB+"</text:span><text:span text:style-name="NormalTok">]</text:span><text:span text:style-name="OperatorTok">,</text:span><text:span text:style-name="NormalTok"><text:s text:c="1"/></text:span><text:span text:style-name="DataTypeTok">receiveFrom</text:span><text:span text:style-name="OperatorTok">:</text:span><text:span text:style-name="NormalTok"><text:s text:c="1"/>[</text:span><text:span text:style-name="StringTok">"O-"</text:span><text:span text:style-name="NormalTok">] }</text:span><text:span text:style-name="OperatorTok">,</text:span>
</text:p>
      <text:p text:style-name="Preformatted_20_Text">
<text:span text:style-name="NormalTok"><text:s text:c="2"/></text:span><text:span text:style-name="StringTok">"O+"</text:span><text:span text:style-name="OperatorTok">:</text:span><text:span text:style-name="NormalTok"><text:s text:c="2"/>{ </text:span><text:span text:style-name="DataTypeTok">donateTo</text:span><text:span text:style-name="OperatorTok">:</text:span><text:span text:style-name="NormalTok"><text:s text:c="1"/>[</text:span><text:span text:style-name="StringTok">"O+"</text:span><text:span text:style-name="OperatorTok">,</text:span><text:span text:style-name="StringTok">"A+"</text:span><text:span text:style-name="OperatorTok">,</text:span><text:span text:style-name="StringTok">"B+"</text:span><text:span text:style-name="OperatorTok">,</text:span><text:span text:style-name="StringTok">"AB+"</text:span><text:span text:style-name="NormalTok">]</text:span><text:span text:style-name="OperatorTok">,</text:span><text:span text:style-name="NormalTok"><text:s text:c="1"/></text:span><text:span text:style-name="DataTypeTok">receiveFrom</text:span><text:span text:style-name="OperatorTok">:</text:span><text:span text:style-name="NormalTok"><text:s text:c="1"/>[</text:span><text:span text:style-name="StringTok">"O-"</text:span><text:span text:style-name="OperatorTok">,</text:span><text:span text:style-name="StringTok">"O+"</text:span><text:span text:style-name="NormalTok">] }</text:span><text:span text:style-name="OperatorTok">,</text:span>
</text:p>
      <text:p text:style-name="Preformatted_20_Text">
<text:span text:style-name="NormalTok"><text:s text:c="2"/></text:span><text:span text:style-name="CommentTok">// ... অন্যান্য রক্তের ধরন</text:span>
</text:p>
      <text:p text:style-name="Preformatted_20_Text">
<text:span text:style-name="NormalTok">}</text:span><text:span text:style-name="OperatorTok">;</text:span>
</text:p>
      <text:p text:style-name="First_20_paragraph"><text:span text:style-name="T1">[স্ক্রিনশট: ল্যান্ডিং পেজ]</text:span></text:p>
      <text:h text:style-name="Heading_20_3" text:outline-level="3"><text:bookmark-start text:name="রকতদত-অনসনধন-পজ-donor-search-page"/>৯.২ রক্তদাতা অনুসন্ধান পেজ (Donor Search Page)<text:bookmark-end text:name="রকতদত-অনসনধন-পজ-donor-search-page"/></text:h>
      <text:p text:style-name="First_20_paragraph"><text:span text:style-name="T1">পাথ:</text:span> <text:span text:style-name="Source_Text">/donors</text:span></text:p>
      <text:p text:style-name="Text_20_body">এই পেজটি রক্তদাতাদের খুঁজে বের করার প্রধান পৃষ্ঠা।</text:p>
      <text:p text:style-name="Text_20_body"><text:span text:style-name="T1">মূল বৈশিষ্ট্য:</text:span> - রক্তের ধরন, জেলা, এলাকা অনুযায়ী ফিল্টারিং - জিওলোকেশন-ভিত্তিক অনুসন্ধান (Haversine Formula) - পেজিনেশন (প্রতি পৃষ্ঠায় ১২টি ফলাফল) - 3D অ্যানিমেটেড কন্টাক্ট কার্ড - মডালে সম্পূর্ণ প্রোফাইল</text:p>
      <text:p text:style-name="Text_20_body"><text:span text:style-name="T1">Haversine Formula:</text:span></text:p>
      <text:p text:style-name="Preformatted_20_Text">
<text:span text:style-name="KeywordTok">function</text:span><text:span text:style-name="NormalTok"><text:s text:c="1"/></text:span><text:span text:style-name="FunctionTok">haversineDistance</text:span><text:span text:style-name="NormalTok">(lat1</text:span><text:span text:style-name="OperatorTok">,</text:span><text:span text:style-name="NormalTok"><text:s text:c="1"/>lng1</text:span><text:span text:style-name="OperatorTok">,</text:span><text:span text:style-name="NormalTok"><text:s text:c="1"/>lat2</text:span><text:span text:style-name="OperatorTok">,</text:span><text:span text:style-name="NormalTok"><text:s text:c="1"/>lng2) {</text:span>
</text:p>
      <text:p text:style-name="Preformatted_20_Text">
<text:span text:style-name="NormalTok"><text:s text:c="2"/></text:span><text:span text:style-name="KeywordTok">const</text:span><text:span text:style-name="NormalTok"><text:s text:c="1"/>R </text:span><text:span text:style-name="OperatorTok">=</text:span><text:span text:style-name="NormalTok"><text:s text:c="1"/></text:span><text:span text:style-name="DecValTok">6371</text:span><text:span text:style-name="OperatorTok">;</text:span><text:span text:style-name="NormalTok"><text:s text:c="1"/></text:span><text:span text:style-name="CommentTok">// পৃথিবীর ব্যাসার্ধ (কিমি)</text:span>
</text:p>
      <text:p text:style-name="Preformatted_20_Text">
<text:span text:style-name="NormalTok"><text:s text:c="2"/></text:span><text:span text:style-name="KeywordTok">const</text:span><text:span text:style-name="NormalTok"><text:s text:c="1"/>dLat </text:span><text:span text:style-name="OperatorTok">=</text:span><text:span text:style-name="NormalTok"><text:s text:c="1"/>(lat2 </text:span><text:span text:style-name="OperatorTok">-</text:span><text:span text:style-name="NormalTok"><text:s text:c="1"/>lat1) </text:span><text:span text:style-name="OperatorTok">*</text:span><text:span text:style-name="NormalTok"><text:s text:c="1"/></text:span><text:span text:style-name="BuiltInTok">Math</text:span><text:span text:style-name="OperatorTok">.</text:span><text:span text:style-name="ConstantTok">PI</text:span><text:span text:style-name="NormalTok"><text:s text:c="1"/></text:span><text:span text:style-name="OperatorTok">/</text:span><text:span text:style-name="NormalTok"><text:s text:c="1"/></text:span><text:span text:style-name="DecValTok">180</text:span><text:span text:style-name="OperatorTok">;</text:span>
</text:p>
      <text:p text:style-name="Preformatted_20_Text">
<text:span text:style-name="NormalTok"><text:s text:c="2"/></text:span><text:span text:style-name="KeywordTok">const</text:span><text:span text:style-name="NormalTok"><text:s text:c="1"/>dLng </text:span><text:span text:style-name="OperatorTok">=</text:span><text:span text:style-name="NormalTok"><text:s text:c="1"/>(lng2 </text:span><text:span text:style-name="OperatorTok">-</text:span><text:span text:style-name="NormalTok"><text:s text:c="1"/>lng1) </text:span><text:span text:style-name="OperatorTok">*</text:span><text:span text:style-name="NormalTok"><text:s text:c="1"/></text:span><text:span text:style-name="BuiltInTok">Math</text:span><text:span text:style-name="OperatorTok">.</text:span><text:span text:style-name="ConstantTok">PI</text:span><text:span text:style-name="NormalTok"><text:s text:c="1"/></text:span><text:span text:style-name="OperatorTok">/</text:span><text:span text:style-name="NormalTok"><text:s text:c="1"/></text:span><text:span text:style-name="DecValTok">180</text:span><text:span text:style-name="OperatorTok">;</text:span>
</text:p>
      <text:p text:style-name="Preformatted_20_Text">
<text:span text:style-name="NormalTok"><text:s text:c="2"/></text:span><text:span text:style-name="KeywordTok">const</text:span><text:span text:style-name="NormalTok"><text:s text:c="1"/>a </text:span><text:span text:style-name="OperatorTok">=</text:span><text:span text:style-name="NormalTok"><text:s text:c="1"/></text:span><text:span text:style-name="BuiltInTok">Math</text:span><text:span text:style-name="OperatorTok">.</text:span><text:span text:style-name="FunctionTok">sin</text:span><text:span text:style-name="NormalTok">(dLat </text:span><text:span text:style-name="OperatorTok">/</text:span><text:span text:style-name="NormalTok"><text:s text:c="1"/></text:span><text:span text:style-name="DecValTok">2</text:span><text:span text:style-name="NormalTok">) </text:span><text:span text:style-name="OperatorTok">**</text:span><text:span text:style-name="NormalTok"><text:s text:c="1"/></text:span><text:span text:style-name="DecValTok">2</text:span><text:span text:style-name="NormalTok"><text:s text:c="1"/></text:span><text:span text:style-name="OperatorTok">+</text:span>
</text:p>
      <text:p text:style-name="Preformatted_20_Text">
<text:span text:style-name="NormalTok"><text:s text:c="4"/></text:span><text:span text:style-name="BuiltInTok">Math</text:span><text:span text:style-name="OperatorTok">.</text:span><text:span text:style-name="FunctionTok">cos</text:span><text:span text:style-name="NormalTok">(lat1 </text:span><text:span text:style-name="OperatorTok">*</text:span><text:span text:style-name="NormalTok"><text:s text:c="1"/></text:span><text:span text:style-name="BuiltInTok">Math</text:span><text:span text:style-name="OperatorTok">.</text:span><text:span text:style-name="ConstantTok">PI</text:span><text:span text:style-name="NormalTok"><text:s text:c="1"/></text:span><text:span text:style-name="OperatorTok">/</text:span><text:span text:style-name="NormalTok"><text:s text:c="1"/></text:span><text:span text:style-name="DecValTok">180</text:span><text:span text:style-name="NormalTok">) </text:span><text:span text:style-name="OperatorTok">*</text:span><text:span text:style-name="NormalTok"><text:s text:c="1"/></text:span><text:span text:style-name="BuiltInTok">Math</text:span><text:span text:style-name="OperatorTok">.</text:span><text:span text:style-name="FunctionTok">cos</text:span><text:span text:style-name="NormalTok">(lat2 </text:span><text:span text:style-name="OperatorTok">*</text:span><text:span text:style-name="NormalTok"><text:s text:c="1"/></text:span><text:span text:style-name="BuiltInTok">Math</text:span><text:span text:style-name="OperatorTok">.</text:span><text:span text:style-name="ConstantTok">PI</text:span><text:span text:style-name="NormalTok"><text:s text:c="1"/></text:span><text:span text:style-name="OperatorTok">/</text:span><text:span text:style-name="NormalTok"><text:s text:c="1"/></text:span><text:span text:style-name="DecValTok">180</text:span><text:span text:style-name="NormalTok">) </text:span><text:span text:style-name="OperatorTok">*</text:span>
</text:p>
      <text:p text:style-name="Preformatted_20_Text">
<text:span text:style-name="NormalTok"><text:s text:c="4"/></text:span><text:span text:style-name="BuiltInTok">Math</text:span><text:span text:style-name="OperatorTok">.</text:span><text:span text:style-name="FunctionTok">sin</text:span><text:span text:style-name="NormalTok">(dLng </text:span><text:span text:style-name="OperatorTok">/</text:span><text:span text:style-name="NormalTok"><text:s text:c="1"/></text:span><text:span text:style-name="DecValTok">2</text:span><text:span text:style-name="NormalTok">) </text:span><text:span text:style-name="OperatorTok">**</text:span><text:span text:style-name="NormalTok"><text:s text:c="1"/></text:span><text:span text:style-name="DecValTok">2</text:span><text:span text:style-name="OperatorTok">;</text:span>
</text:p>
      <text:p text:style-name="Preformatted_20_Text">
<text:span text:style-name="NormalTok"><text:s text:c="2"/></text:span><text:span text:style-name="ControlFlowTok">return</text:span><text:span text:style-name="NormalTok"><text:s text:c="1"/>R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BuiltInTok">Math</text:span><text:span text:style-name="OperatorTok">.</text:span><text:span text:style-name="FunctionTok">atan2</text:span><text:span text:style-name="NormalTok">(</text:span><text:span text:style-name="BuiltInTok">Math</text:span><text:span text:style-name="OperatorTok">.</text:span><text:span text:style-name="FunctionTok">sqrt</text:span><text:span text:style-name="NormalTok">(a)</text:span><text:span text:style-name="OperatorTok">,</text:span><text:span text:style-name="NormalTok"><text:s text:c="1"/></text:span><text:span text:style-name="BuiltInTok">Math</text:span><text:span text:style-name="OperatorTok">.</text:span><text:span text:style-name="FunctionTok">sqrt</text:span><text:span text:style-name="NormalTok">(</text:span><text:span text:style-name="DecValTok">1</text:span><text:span text:style-name="NormalTok"><text:s text:c="1"/></text:span><text:span text:style-name="OperatorTok">-</text:span><text:span text:style-name="NormalTok"><text:s text:c="1"/>a))</text:span><text:span text:style-name="OperatorTok">;</text:span>
</text:p>
      <text:p text:style-name="Preformatted_20_Text">
<text:span text:style-name="NormalTok">}</text:span>
</text:p>
      <text:p text:style-name="First_20_paragraph"><text:span text:style-name="T1">[স্ক্রিনশট: রক্তদাতা অনুসন্ধান পেজ]</text:span></text:p>
      <text:h text:style-name="Heading_20_3" text:outline-level="3"><text:bookmark-start text:name="রকতর-অনরধ-পজ-blood-request-pages"/>৯.৩ রক্তের অনুরোধ পেজ (Blood Request Pages)<text:bookmark-end text:name="রকতর-অনরধ-পজ-blood-request-pages"/></text:h>
      <text:p text:style-name="First_20_paragraph"><text:span text:style-name="T1">পাথ:</text:span> <text:span text:style-name="Source_Text">/requests</text:span>, <text:span text:style-name="Source_Text">/requests/:id</text:span>, <text:span text:style-name="Source_Text">/requests/create</text:span></text:p>
      <text:p text:style-name="Text_20_body">তিনটি সম্পর্কিত পেজ:</text:p>
      <text:list text:style-name="L8">
        <text:list-item>
          <text:p text:style-name="P189"><text:span text:style-name="T1">তালিকা পেজ:</text:span> সকল রক্তের অনুরোধ দেখা ও ফিল্টার করা</text:p>
        </text:list-item>
        <text:list-item>
          <text:p text:style-name="P189"><text:span text:style-name="T1">বিস্তারিত পেজ:</text:span> অনুরোধের সম্পূর্ণ তথ্য ও কার্যক্রম</text:p>
        </text:list-item>
        <text:list-item>
          <text:p text:style-name="P189"><text:span text:style-name="T1">তৈরি পেজ:</text:span> নতুন রক্তের অনুরোধ তৈরি করা</text:p>
        </text:list-item>
      </text:list>
      <text:p text:style-name="First_20_paragraph"><text:span text:style-name="T1">অনুরোধের অবস্থা (Status):</text:span></text:p>
      <text:p text:style-name="P190">graph LR</text:p>
      <text:p text:style-name="P191"><text:s text:c="4"/>A[Open] --&gt;|রক্তদাতা গ্রহণ| B[Accepted]</text:p>
      <text:p text:style-name="P192"><text:s text:c="4"/>A --&gt;|অনুরোধকারী বাতিল| C[Cancelled]</text:p>
      <text:p text:style-name="P193"><text:s text:c="4"/>B --&gt;|রক্তদান সম্পূর্ণ| D[Completed]</text:p>
      <text:p text:style-name="P194"><text:s text:c="4"/>B --&gt;|রক্তদাতা বাতিল| A</text:p>
      <text:p text:style-name="First_20_paragraph"><text:span text:style-name="T1">[স্ক্রিনশট: রক্তের অনুরোধ পেজ]</text:span></text:p>
      <text:h text:style-name="Heading_20_3" text:outline-level="3"><text:bookmark-start text:name="রযল-টইম-চযট-পজ-chat-page"/>৯.৪ রিয়েল-টাইম চ্যাট পেজ (Chat Page)<text:bookmark-end text:name="রযল-টইম-চযট-পজ-chat-page"/></text:h>
      <text:p text:style-name="First_20_paragraph"><text:span text:style-name="T1">পাথ:</text:span> <text:span text:style-name="Source_Text">/chat</text:span>, <text:span text:style-name="Source_Text">/chat/:userId</text:span></text:p>
      <text:p text:style-name="Text_20_body">চ্যাট পেজটি Socket.IO ব্যবহার করে রিয়েল-টাইম যোগাযোগ প্রদান করে।</text:p>
      <text:p text:style-name="Text_20_body"><text:span text:style-name="T1">মূল বৈশিষ্ট্য:</text:span> - রেসপন্সিভ লেআউট (ডেস্কটপে সাইডবার + কনভারসেশন) - অনলাইন স্ট্যাটাস ট্র্যাকিং - টাইপিং ইন্ডিকেটর - রিড রিসিট (ডাবল চেকমার্ক) - ইমেজ শেয়ারিং (২MB সীমা) - ইমোজি পিকার (১০০+ ইমোজি)</text:p>
      <text:p text:style-name="Text_20_body"><text:span text:style-name="T1">Socket.IO ইভেন্ট:</text:span></text:p>
      <text:p text:style-name="Preformatted_20_Text">
<text:span text:style-name="CommentTok">// মেসেজ পাঠানো</text:span>
</text:p>
      <text:p text:style-name="Preformatted_20_Text">
<text:span text:style-name="NormalTok">socket</text:span><text:span text:style-name="OperatorTok">.</text:span><text:span text:style-name="FunctionTok">emit</text:span><text:span text:style-name="NormalTok">(</text:span><text:span text:style-name="StringTok">"message:send"</text:span><text:span text:style-name="OperatorTok">,</text:span><text:span text:style-name="NormalTok"><text:s text:c="1"/>{ conversationId</text:span><text:span text:style-name="OperatorTok">,</text:span><text:span text:style-name="NormalTok"><text:s text:c="1"/>text</text:span><text:span text:style-name="OperatorTok">,</text:span><text:span text:style-name="NormalTok"><text:s text:c="1"/>receiverId })</text:span><text:span text:style-name="OperatorTok">;</text:span>
</text:p>
      <text:p text:style-name="Preformatted_20_Text">
</text:p>
      <text:p text:style-name="Preformatted_20_Text">
<text:span text:style-name="CommentTok">// মেসেজ গ্রহণ</text:span>
</text:p>
      <text:p text:style-name="Preformatted_20_Text">
<text:span text:style-name="NormalTok">socket</text:span><text:span text:style-name="OperatorTok">.</text:span><text:span text:style-name="FunctionTok">on</text:span><text:span text:style-name="NormalTok">(</text:span><text:span text:style-name="StringTok">"message:received"</text:span><text:span text:style-name="OperatorTok">,</text:span><text:span text:style-name="NormalTok"><text:s text:c="1"/>(message) </text:span><text:span text:style-name="KeywordTok">=&gt;</text:span><text:span text:style-name="NormalTok"><text:s text:c="1"/>{ </text:span><text:span text:style-name="CommentTok">/* ... */</text:span><text:span text:style-name="NormalTok"><text:s text:c="1"/>})</text:span><text:span text:style-name="OperatorTok">;</text:span>
</text:p>
      <text:p text:style-name="Preformatted_20_Text">
</text:p>
      <text:p text:style-name="Preformatted_20_Text">
<text:span text:style-name="CommentTok">// টাইপিং ইন্ডিকেটর</text:span>
</text:p>
      <text:p text:style-name="Preformatted_20_Text">
<text:span text:style-name="NormalTok">socket</text:span><text:span text:style-name="OperatorTok">.</text:span><text:span text:style-name="FunctionTok">emit</text:span><text:span text:style-name="NormalTok">(</text:span><text:span text:style-name="StringTok">"typing:start"</text:span><text:span text:style-name="OperatorTok">,</text:span><text:span text:style-name="NormalTok"><text:s text:c="1"/>{ conversationId })</text:span><text:span text:style-name="OperatorTok">;</text:span>
</text:p>
      <text:p text:style-name="Preformatted_20_Text">
<text:span text:style-name="NormalTok">socket</text:span><text:span text:style-name="OperatorTok">.</text:span><text:span text:style-name="FunctionTok">on</text:span><text:span text:style-name="NormalTok">(</text:span><text:span text:style-name="StringTok">"typing:stop"</text:span><text:span text:style-name="OperatorTok">,</text:span><text:span text:style-name="NormalTok"><text:s text:c="1"/>{ conversationId</text:span><text:span text:style-name="OperatorTok">,</text:span><text:span text:style-name="NormalTok"><text:s text:c="1"/>userId })</text:span><text:span text:style-name="OperatorTok">;</text:span>
</text:p>
      <text:p text:style-name="First_20_paragraph"><text:span text:style-name="T1">[স্ক্রিনশট: চ্যাট পেজ]</text:span></text:p>
      <text:h text:style-name="Heading_20_3" text:outline-level="3"><text:bookmark-start text:name="কনকশন-পজ-connect-page"/>৯.৫ কানেকশন পেজ (Connect Page)<text:bookmark-end text:name="কনকশন-পজ-connect-page"/></text:h>
      <text:p text:style-name="First_20_paragraph"><text:span text:style-name="T1">পাথ:</text:span> <text:span text:style-name="Source_Text">/connect</text:span></text:p>
      <text:p text:style-name="Text_20_body">কানেকশন পেজটি দুটি ট্যাবে বিভক্ত: 1. <text:span text:style-name="T1">পেন্ডিং রিকোয়েস্ট:</text:span> আসা কানেকশন রিকোয়েস্ট 2. <text:span text:style-name="T1">আমার কানেকশন:</text:span> গৃহীত কানেকশন তালিকা</text:p>
      <text:p text:style-name="Text_20_body"><text:span text:style-name="T1">কানেকশন প্রক্রিয়া:</text:span></text:p>
      <text:p text:style-name="P195">sequenceDiagram</text:p>
      <text:p text:style-name="P196"><text:s text:c="4"/>participant A as ব্যবহারকারী A</text:p>
      <text:p text:style-name="P197"><text:s text:c="4"/>participant S as সার্ভার</text:p>
      <text:p text:style-name="P198"><text:s text:c="4"/>participant B as ব্যবহারকারী B</text:p>
      <text:p text:style-name="P199"/>
      <text:p text:style-name="P200"><text:s text:c="4"/>A-&gt;&gt;S: POST /api/friends/send/B</text:p>
      <text:p text:style-name="P201"><text:s text:c="4"/>S-&gt;&gt;S: FriendRequest.create({sender:A, receiver:B})</text:p>
      <text:p text:style-name="P202"><text:s text:c="4"/>S--&gt;&gt;B: নোটিফিকেশন</text:p>
      <text:p text:style-name="P203"><text:s text:c="4"/>B-&gt;&gt;S: PATCH /api/friends/accept/requestId</text:p>
      <text:p text:style-name="P204"><text:s text:c="4"/>S-&gt;&gt;S: FriendRequest.status = "accepted"</text:p>
      <text:p text:style-name="P205"><text:s text:c="4"/>S--&gt;&gt;A: নোটিফিকেশন</text:p>
      <text:p text:style-name="P206"><text:s text:c="4"/>Note over A,B: এখন ফোন নম্বর দৃশ্যমান</text:p>
      <text:p text:style-name="First_20_paragraph"><text:span text:style-name="T1">[স্ক্রিনশট: কানেকশন পেজ]</text:span></text:p>
      <text:h text:style-name="Heading_20_3" text:outline-level="3"><text:bookmark-start text:name="লডরবরড-পজ-leaderboard-page"/>৯.৬ লিডারবোর্ড পেজ (Leaderboard Page)<text:bookmark-end text:name="লডরবরড-পজ-leaderboard-page"/></text:h>
      <text:p text:style-name="First_20_paragraph"><text:span text:style-name="T1">পাথ:</text:span> <text:span text:style-name="Source_Text">/leaderboard</text:span></text:p>
      <text:p text:style-name="Text_20_body"><text:span text:style-name="T1">RPG র‍্যাংক সিস্টেম:</text:spa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র‍্যাংক</text:p>
            </table:table-cell>
            <table:table-cell table:style-name="TableHeaderRowCell" office:value-type="string">
              <text:p text:style-name="Table_20_Heading">প্রয়োজনীয় রক্তদান</text:p>
            </table:table-cell>
            <table:table-cell table:style-name="TableHeaderRowCell" office:value-type="string">
              <text:p text:style-name="Table_20_Heading">বিবরণ</text:p>
            </table:table-cell>
          </table:table-row>
        </table:table-header-rows>
        <table:table-row>
          <table:table-cell table:style-name="TableRowCell" office:value-type="string">
            <text:p text:style-name="Table_20_Contents">Recruit</text:p>
          </table:table-cell>
          <table:table-cell table:style-name="TableRowCell" office:value-type="string">
            <text:p text:style-name="Table_20_Contents">০+</text:p>
          </table:table-cell>
          <table:table-cell table:style-name="TableRowCell" office:value-type="string">
            <text:p text:style-name="Table_20_Contents">শুরুর পর্যায়</text:p>
          </table:table-cell>
        </table:table-row>
        <table:table-row>
          <table:table-cell table:style-name="TableRowCell" office:value-type="string">
            <text:p text:style-name="Table_20_Contents">Healer</text:p>
          </table:table-cell>
          <table:table-cell table:style-name="TableRowCell" office:value-type="string">
            <text:p text:style-name="Table_20_Contents">১+</text:p>
          </table:table-cell>
          <table:table-cell table:style-name="TableRowCell" office:value-type="string">
            <text:p text:style-name="Table_20_Contents">প্রথম রক্তদান</text:p>
          </table:table-cell>
        </table:table-row>
        <table:table-row>
          <table:table-cell table:style-name="TableRowCell" office:value-type="string">
            <text:p text:style-name="Table_20_Contents">Knight</text:p>
          </table:table-cell>
          <table:table-cell table:style-name="TableRowCell" office:value-type="string">
            <text:p text:style-name="Table_20_Contents">৫+</text:p>
          </table:table-cell>
          <table:table-cell table:style-name="TableRowCell" office:value-type="string">
            <text:p text:style-name="Table_20_Contents">অভিজ্ঞ রক্তদাতা</text:p>
          </table:table-cell>
        </table:table-row>
        <table:table-row>
          <table:table-cell table:style-name="TableRowCell" office:value-type="string">
            <text:p text:style-name="Table_20_Contents">Champion</text:p>
          </table:table-cell>
          <table:table-cell table:style-name="TableRowCell" office:value-type="string">
            <text:p text:style-name="Table_20_Contents">৭+</text:p>
          </table:table-cell>
          <table:table-cell table:style-name="TableRowCell" office:value-type="string">
            <text:p text:style-name="Table_20_Contents">দক্ষ রক্তদাতা</text:p>
          </table:table-cell>
        </table:table-row>
        <table:table-row>
          <table:table-cell table:style-name="TableRowCell" office:value-type="string">
            <text:p text:style-name="Table_20_Contents">Hero</text:p>
          </table:table-cell>
          <table:table-cell table:style-name="TableRowCell" office:value-type="string">
            <text:p text:style-name="Table_20_Contents">১০+</text:p>
          </table:table-cell>
          <table:table-cell table:style-name="TableRowCell" office:value-type="string">
            <text:p text:style-name="Table_20_Contents">আদর্শ রক্তদাতা</text:p>
          </table:table-cell>
        </table:table-row>
        <table:table-row>
          <table:table-cell table:style-name="TableRowCell" office:value-type="string">
            <text:p text:style-name="Table_20_Contents">Legend</text:p>
          </table:table-cell>
          <table:table-cell table:style-name="TableRowCell" office:value-type="string">
            <text:p text:style-name="Table_20_Contents">১২+</text:p>
          </table:table-cell>
          <table:table-cell table:style-name="TableRowCell" office:value-type="string">
            <text:p text:style-name="Table_20_Contents">কিংবদন্তী রক্তদাতা</text:p>
          </table:table-cell>
        </table:table-row>
      </table:table>
      <text:p text:style-name="First_20_paragraph"><text:span text:style-name="T1">[স্ক্রিনশট: লিডারবোর্ড পেজ]</text:span></text:p>
      <text:h text:style-name="Heading_20_3" text:outline-level="3"><text:bookmark-start text:name="ডযশবরড-পজ-dashboard-page"/>৯.৭ ড্যাশবোর্ড পেজ (Dashboard Page)<text:bookmark-end text:name="ডযশবরড-পজ-dashboard-page"/></text:h>
      <text:p text:style-name="First_20_paragraph"><text:span text:style-name="T1">পাথ:</text:span> <text:span text:style-name="Source_Text">/dashboard</text:span></text:p>
      <text:p text:style-name="Text_20_body">ড্যাশবোর্ড পেজটি ব্যবহারকারীর ব্যক্তিগত হোম পেজ।</text:p>
      <text:p text:style-name="Text_20_body"><text:span text:style-name="T1">মূল বৈশিষ্ট্য:</text:span> - প্রোফাইল কার্ড (নাম, রক্তের ধরন, জেলা) - পরিসংখ্যান (মোট রক্তদান, অনুরোধ, কানেকশন) - রক্তদান লগিং (৯০ দিনের কুলডাউন রিমাইন্ডার) - সাম্প্রতিক অনুরোধ - ফিডব্যাক সাবমিশন</text:p>
      <text:p text:style-name="Text_20_body"><text:span text:style-name="T1">[স্ক্রিনশট: ড্যাশবোর্ড পেজ]</text:span></text:p>
      <text:h text:style-name="Heading_20_3" text:outline-level="3"><text:bookmark-start text:name="সটস-পজ-settings-page"/>৯.৮ সেটিংস পেজ (Settings Page)<text:bookmark-end text:name="সটস-পজ-settings-page"/></text:h>
      <text:p text:style-name="First_20_paragraph"><text:span text:style-name="T1">পাথ:</text:span> <text:span text:style-name="Source_Text">/settings</text:span></text:p>
      <text:p text:style-name="Text_20_body"><text:span text:style-name="T1">মূল বৈশিষ্ট্য:</text:span> - প্রোফাইল ছবি আপলোড (base64) - নাম, ফোন, জেলা, এলাকা, বায়ো সম্পাদনা - থিম টগল (ডার্ক/লাইট) - লগআউট</text:p>
      <text:p text:style-name="Text_20_body"><text:span text:style-name="T1">[স্ক্রিনশট: সেটিংস পেজ]</text:span></text:p>
      <text:h text:style-name="Heading_20_3" text:outline-level="3"><text:bookmark-start text:name="api-এনডপযনট-তলক"/>৯.৯ API এন্ডপয়েন্ট তালিকা<text:bookmark-end text:name="api-এনডপযনট-তলক"/></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মডিউল</text:p>
            </table:table-cell>
            <table:table-cell table:style-name="TableHeaderRowCell" office:value-type="string">
              <text:p text:style-name="Table_20_Heading">পদ্ধতি</text:p>
            </table:table-cell>
            <table:table-cell table:style-name="TableHeaderRowCell" office:value-type="string">
              <text:p text:style-name="Table_20_Heading">এন্ডপয়েন্ট</text:p>
            </table:table-cell>
            <table:table-cell table:style-name="TableHeaderRowCell" office:value-type="string">
              <text:p text:style-name="Table_20_Heading">বিবরণ</text:p>
            </table:table-cell>
          </table:table-row>
        </table:table-header-rows>
        <table:table-row>
          <table:table-cell table:style-name="TableRowCell" office:value-type="string">
            <text:p text:style-name="Table_20_Contents">অথ</text:p>
          </table:table-cell>
          <table:table-cell table:style-name="TableRowCell" office:value-type="string">
            <text:p text:style-name="Table_20_Contents">POST</text:p>
          </table:table-cell>
          <table:table-cell table:style-name="TableRowCell" office:value-type="string">
            <text:p text:style-name="Table_20_Contents">/api/auth/register</text:p>
          </table:table-cell>
          <table:table-cell table:style-name="TableRowCell" office:value-type="string">
            <text:p text:style-name="Table_20_Contents">নিবন্ধন</text:p>
          </table:table-cell>
        </table:table-row>
        <table:table-row>
          <table:table-cell table:style-name="TableRowCell" office:value-type="string">
            <text:p text:style-name="Table_20_Contents">অথ</text:p>
          </table:table-cell>
          <table:table-cell table:style-name="TableRowCell" office:value-type="string">
            <text:p text:style-name="Table_20_Contents">POST</text:p>
          </table:table-cell>
          <table:table-cell table:style-name="TableRowCell" office:value-type="string">
            <text:p text:style-name="Table_20_Contents">/api/auth/login</text:p>
          </table:table-cell>
          <table:table-cell table:style-name="TableRowCell" office:value-type="string">
            <text:p text:style-name="Table_20_Contents">লগইন</text:p>
          </table:table-cell>
        </table:table-row>
        <table:table-row>
          <table:table-cell table:style-name="TableRowCell" office:value-type="string">
            <text:p text:style-name="Table_20_Contents">অথ</text:p>
          </table:table-cell>
          <table:table-cell table:style-name="TableRowCell" office:value-type="string">
            <text:p text:style-name="Table_20_Contents">GET</text:p>
          </table:table-cell>
          <table:table-cell table:style-name="TableRowCell" office:value-type="string">
            <text:p text:style-name="Table_20_Contents">/api/auth/me</text:p>
          </table:table-cell>
          <table:table-cell table:style-name="TableRowCell" office:value-type="string">
            <text:p text:style-name="Table_20_Contents">বর্তমান ব্যবহারকারী</text:p>
          </table:table-cell>
        </table:table-row>
        <table:table-row>
          <table:table-cell table:style-name="TableRowCell" office:value-type="string">
            <text:p text:style-name="Table_20_Contents">অথ</text:p>
          </table:table-cell>
          <table:table-cell table:style-name="TableRowCell" office:value-type="string">
            <text:p text:style-name="Table_20_Contents">PUT</text:p>
          </table:table-cell>
          <table:table-cell table:style-name="TableRowCell" office:value-type="string">
            <text:p text:style-name="Table_20_Contents">/api/auth/me</text:p>
          </table:table-cell>
          <table:table-cell table:style-name="TableRowCell" office:value-type="string">
            <text:p text:style-name="Table_20_Contents">প্রোফাইল আপডেট</text:p>
          </table:table-cell>
        </table:table-row>
        <table:table-row>
          <table:table-cell table:style-name="TableRowCell" office:value-type="string">
            <text:p text:style-name="Table_20_Contents">ডোনার</text:p>
          </table:table-cell>
          <table:table-cell table:style-name="TableRowCell" office:value-type="string">
            <text:p text:style-name="Table_20_Contents">GET</text:p>
          </table:table-cell>
          <table:table-cell table:style-name="TableRowCell" office:value-type="string">
            <text:p text:style-name="Table_20_Contents">/api/donors/search</text:p>
          </table:table-cell>
          <table:table-cell table:style-name="TableRowCell" office:value-type="string">
            <text:p text:style-name="Table_20_Contents">রক্তদাতা অনুসন্ধান</text:p>
          </table:table-cell>
        </table:table-row>
        <table:table-row>
          <table:table-cell table:style-name="TableRowCell" office:value-type="string">
            <text:p text:style-name="Table_20_Contents">ডোনার</text:p>
          </table:table-cell>
          <table:table-cell table:style-name="TableRowCell" office:value-type="string">
            <text:p text:style-name="Table_20_Contents">GET</text:p>
          </table:table-cell>
          <table:table-cell table:style-name="TableRowCell" office:value-type="string">
            <text:p text:style-name="Table_20_Contents">/api/donors/leaderboard</text:p>
          </table:table-cell>
          <table:table-cell table:style-name="TableRowCell" office:value-type="string">
            <text:p text:style-name="Table_20_Contents">লিডারবোর্ড</text:p>
          </table:table-cell>
        </table:table-row>
        <table:table-row>
          <table:table-cell table:style-name="TableRowCell" office:value-type="string">
            <text:p text:style-name="Table_20_Contents">ডোনার</text:p>
          </table:table-cell>
          <table:table-cell table:style-name="TableRowCell" office:value-type="string">
            <text:p text:style-name="Table_20_Contents">GET</text:p>
          </table:table-cell>
          <table:table-cell table:style-name="TableRowCell" office:value-type="string">
            <text:p text:style-name="Table_20_Contents">/api/donors/:id</text:p>
          </table:table-cell>
          <table:table-cell table:style-name="TableRowCell" office:value-type="string">
            <text:p text:style-name="Table_20_Contents">রক্তদাতার প্রোফাইল</text:p>
          </table:table-cell>
        </table:table-row>
        <table:table-row>
          <table:table-cell table:style-name="TableRowCell" office:value-type="string">
            <text:p text:style-name="Table_20_Contents">অনুরোধ</text:p>
          </table:table-cell>
          <table:table-cell table:style-name="TableRowCell" office:value-type="string">
            <text:p text:style-name="Table_20_Contents">GET</text:p>
          </table:table-cell>
          <table:table-cell table:style-name="TableRowCell" office:value-type="string">
            <text:p text:style-name="Table_20_Contents">/api/requests</text:p>
          </table:table-cell>
          <table:table-cell table:style-name="TableRowCell" office:value-type="string">
            <text:p text:style-name="Table_20_Contents">সকল অনুরোধ</text:p>
          </table:table-cell>
        </table:table-row>
        <table:table-row>
          <table:table-cell table:style-name="TableRowCell" office:value-type="string">
            <text:p text:style-name="Table_20_Contents">অনুরোধ</text:p>
          </table:table-cell>
          <table:table-cell table:style-name="TableRowCell" office:value-type="string">
            <text:p text:style-name="Table_20_Contents">POST</text:p>
          </table:table-cell>
          <table:table-cell table:style-name="TableRowCell" office:value-type="string">
            <text:p text:style-name="Table_20_Contents">/api/requests</text:p>
          </table:table-cell>
          <table:table-cell table:style-name="TableRowCell" office:value-type="string">
            <text:p text:style-name="Table_20_Contents">অনুরোধ তৈরি</text:p>
          </table:table-cell>
        </table:table-row>
        <table:table-row>
          <table:table-cell table:style-name="TableRowCell" office:value-type="string">
            <text:p text:style-name="Table_20_Contents">অনুরোধ</text:p>
          </table:table-cell>
          <table:table-cell table:style-name="TableRowCell" office:value-type="string">
            <text:p text:style-name="Table_20_Contents">PATCH</text:p>
          </table:table-cell>
          <table:table-cell table:style-name="TableRowCell" office:value-type="string">
            <text:p text:style-name="Table_20_Contents">/api/requests/:id/accept</text:p>
          </table:table-cell>
          <table:table-cell table:style-name="TableRowCell" office:value-type="string">
            <text:p text:style-name="Table_20_Contents">অনুরোধ গ্রহণ</text:p>
          </table:table-cell>
        </table:table-row>
        <table:table-row>
          <table:table-cell table:style-name="TableRowCell" office:value-type="string">
            <text:p text:style-name="Table_20_Contents">অনুরোধ</text:p>
          </table:table-cell>
          <table:table-cell table:style-name="TableRowCell" office:value-type="string">
            <text:p text:style-name="Table_20_Contents">PATCH</text:p>
          </table:table-cell>
          <table:table-cell table:style-name="TableRowCell" office:value-type="string">
            <text:p text:style-name="Table_20_Contents">/api/requests/:id/complete</text:p>
          </table:table-cell>
          <table:table-cell table:style-name="TableRowCell" office:value-type="string">
            <text:p text:style-name="Table_20_Contents">অনুরোধ সম্পূর্ণ</text:p>
          </table:table-cell>
        </table:table-row>
        <table:table-row>
          <table:table-cell table:style-name="TableRowCell" office:value-type="string">
            <text:p text:style-name="Table_20_Contents">অনুরোধ</text:p>
          </table:table-cell>
          <table:table-cell table:style-name="TableRowCell" office:value-type="string">
            <text:p text:style-name="Table_20_Contents">DELETE</text:p>
          </table:table-cell>
          <table:table-cell table:style-name="TableRowCell" office:value-type="string">
            <text:p text:style-name="Table_20_Contents">/api/requests/:id</text:p>
          </table:table-cell>
          <table:table-cell table:style-name="TableRowCell" office:value-type="string">
            <text:p text:style-name="Table_20_Contents">অনুরোধ মুছুন</text:p>
          </table:table-cell>
        </table:table-row>
        <table:table-row>
          <table:table-cell table:style-name="TableRowCell" office:value-type="string">
            <text:p text:style-name="Table_20_Contents">চ্যাট</text:p>
          </table:table-cell>
          <table:table-cell table:style-name="TableRowCell" office:value-type="string">
            <text:p text:style-name="Table_20_Contents">GET</text:p>
          </table:table-cell>
          <table:table-cell table:style-name="TableRowCell" office:value-type="string">
            <text:p text:style-name="Table_20_Contents">/api/chat/conversations</text:p>
          </table:table-cell>
          <table:table-cell table:style-name="TableRowCell" office:value-type="string">
            <text:p text:style-name="Table_20_Contents">কনভারসেশন তালিকা</text:p>
          </table:table-cell>
        </table:table-row>
        <table:table-row>
          <table:table-cell table:style-name="TableRowCell" office:value-type="string">
            <text:p text:style-name="Table_20_Contents">চ্যাট</text:p>
          </table:table-cell>
          <table:table-cell table:style-name="TableRowCell" office:value-type="string">
            <text:p text:style-name="Table_20_Contents">POST</text:p>
          </table:table-cell>
          <table:table-cell table:style-name="TableRowCell" office:value-type="string">
            <text:p text:style-name="Table_20_Contents">/api/chat/send</text:p>
          </table:table-cell>
          <table:table-cell table:style-name="TableRowCell" office:value-type="string">
            <text:p text:style-name="Table_20_Contents">মেসেজ পাঠানো</text:p>
          </table:table-cell>
        </table:table-row>
        <table:table-row>
          <table:table-cell table:style-name="TableRowCell" office:value-type="string">
            <text:p text:style-name="Table_20_Contents">চ্যাট</text:p>
          </table:table-cell>
          <table:table-cell table:style-name="TableRowCell" office:value-type="string">
            <text:p text:style-name="Table_20_Contents">GET</text:p>
          </table:table-cell>
          <table:table-cell table:style-name="TableRowCell" office:value-type="string">
            <text:p text:style-name="Table_20_Contents">/api/chat/messages/:id</text:p>
          </table:table-cell>
          <table:table-cell table:style-name="TableRowCell" office:value-type="string">
            <text:p text:style-name="Table_20_Contents">মেসেজ তালিকা</text:p>
          </table:table-cell>
        </table:table-row>
        <table:table-row>
          <table:table-cell table:style-name="TableRowCell" office:value-type="string">
            <text:p text:style-name="Table_20_Contents">বন্ধু</text:p>
          </table:table-cell>
          <table:table-cell table:style-name="TableRowCell" office:value-type="string">
            <text:p text:style-name="Table_20_Contents">POST</text:p>
          </table:table-cell>
          <table:table-cell table:style-name="TableRowCell" office:value-type="string">
            <text:p text:style-name="Table_20_Contents">/api/friends/send/:id</text:p>
          </table:table-cell>
          <table:table-cell table:style-name="TableRowCell" office:value-type="string">
            <text:p text:style-name="Table_20_Contents">রিকোয়েস্ট পাঠানো</text:p>
          </table:table-cell>
        </table:table-row>
        <table:table-row>
          <table:table-cell table:style-name="TableRowCell" office:value-type="string">
            <text:p text:style-name="Table_20_Contents">বন্ধু</text:p>
          </table:table-cell>
          <table:table-cell table:style-name="TableRowCell" office:value-type="string">
            <text:p text:style-name="Table_20_Contents">PATCH</text:p>
          </table:table-cell>
          <table:table-cell table:style-name="TableRowCell" office:value-type="string">
            <text:p text:style-name="Table_20_Contents">/api/friends/accept/:id</text:p>
          </table:table-cell>
          <table:table-cell table:style-name="TableRowCell" office:value-type="string">
            <text:p text:style-name="Table_20_Contents">রিকোয়েস্ট গ্রহণ</text:p>
          </table:table-cell>
        </table:table-row>
        <table:table-row>
          <table:table-cell table:style-name="TableRowCell" office:value-type="string">
            <text:p text:style-name="Table_20_Contents">বন্ধু</text:p>
          </table:table-cell>
          <table:table-cell table:style-name="TableRowCell" office:value-type="string">
            <text:p text:style-name="Table_20_Contents">PATCH</text:p>
          </table:table-cell>
          <table:table-cell table:style-name="TableRowCell" office:value-type="string">
            <text:p text:style-name="Table_20_Contents">/api/friends/reject/:id</text:p>
          </table:table-cell>
          <table:table-cell table:style-name="TableRowCell" office:value-type="string">
            <text:p text:style-name="Table_20_Contents">রিকোয়েস্ট প্রত্যাখ্যান</text:p>
          </table:table-cell>
        </table:table-row>
        <table:table-row>
          <table:table-cell table:style-name="TableRowCell" office:value-type="string">
            <text:p text:style-name="Table_20_Contents">নোটিফিকেশন</text:p>
          </table:table-cell>
          <table:table-cell table:style-name="TableRowCell" office:value-type="string">
            <text:p text:style-name="Table_20_Contents">GET</text:p>
          </table:table-cell>
          <table:table-cell table:style-name="TableRowCell" office:value-type="string">
            <text:p text:style-name="Table_20_Contents">/api/notifications</text:p>
          </table:table-cell>
          <table:table-cell table:style-name="TableRowCell" office:value-type="string">
            <text:p text:style-name="Table_20_Contents">নোটিফিকেশন তালিকা</text:p>
          </table:table-cell>
        </table:table-row>
        <table:table-row>
          <table:table-cell table:style-name="TableRowCell" office:value-type="string">
            <text:p text:style-name="Table_20_Contents">বুকমার্ক</text:p>
          </table:table-cell>
          <table:table-cell table:style-name="TableRowCell" office:value-type="string">
            <text:p text:style-name="Table_20_Contents">POST</text:p>
          </table:table-cell>
          <table:table-cell table:style-name="TableRowCell" office:value-type="string">
            <text:p text:style-name="Table_20_Contents">/api/bookmarks</text:p>
          </table:table-cell>
          <table:table-cell table:style-name="TableRowCell" office:value-type="string">
            <text:p text:style-name="Table_20_Contents">বুকমার্ক যোগ</text:p>
          </table:table-cell>
        </table:table-row>
        <table:table-row>
          <table:table-cell table:style-name="TableRowCell" office:value-type="string">
            <text:p text:style-name="Table_20_Contents">বুকমার্ক</text:p>
          </table:table-cell>
          <table:table-cell table:style-name="TableRowCell" office:value-type="string">
            <text:p text:style-name="Table_20_Contents">GET</text:p>
          </table:table-cell>
          <table:table-cell table:style-name="TableRowCell" office:value-type="string">
            <text:p text:style-name="Table_20_Contents">/api/bookmarks</text:p>
          </table:table-cell>
          <table:table-cell table:style-name="TableRowCell" office:value-type="string">
            <text:p text:style-name="Table_20_Contents">বুকমার্ক তালিকা</text:p>
          </table:table-cell>
        </table:table-row>
        <table:table-row>
          <table:table-cell table:style-name="TableRowCell" office:value-type="string">
            <text:p text:style-name="Table_20_Contents">ডোনেশন লগ</text:p>
          </table:table-cell>
          <table:table-cell table:style-name="TableRowCell" office:value-type="string">
            <text:p text:style-name="Table_20_Contents">POST</text:p>
          </table:table-cell>
          <table:table-cell table:style-name="TableRowCell" office:value-type="string">
            <text:p text:style-name="Table_20_Contents">/api/donation-logs</text:p>
          </table:table-cell>
          <table:table-cell table:style-name="TableRowCell" office:value-type="string">
            <text:p text:style-name="Table_20_Contents">রক্তদান লগ</text:p>
          </table:table-cell>
        </table:table-row>
        <table:table-row>
          <table:table-cell table:style-name="TableRowCell" office:value-type="string">
            <text:p text:style-name="Table_20_Contents">ফিডব্যাক</text:p>
          </table:table-cell>
          <table:table-cell table:style-name="TableRowCell" office:value-type="string">
            <text:p text:style-name="Table_20_Contents">POST</text:p>
          </table:table-cell>
          <table:table-cell table:style-name="TableRowCell" office:value-type="string">
            <text:p text:style-name="Table_20_Contents">/api/feedback</text:p>
          </table:table-cell>
          <table:table-cell table:style-name="TableRowCell" office:value-type="string">
            <text:p text:style-name="Table_20_Contents">ফিডব্যাক দিন</text:p>
          </table:table-cell>
        </table:table-row>
        <table:table-row>
          <table:table-cell table:style-name="TableRowCell" office:value-type="string">
            <text:p text:style-name="Table_20_Contents">রেটিং</text:p>
          </table:table-cell>
          <table:table-cell table:style-name="TableRowCell" office:value-type="string">
            <text:p text:style-name="Table_20_Contents">POST</text:p>
          </table:table-cell>
          <table:table-cell table:style-name="TableRowCell" office:value-type="string">
            <text:p text:style-name="Table_20_Contents">/api/ratings</text:p>
          </table:table-cell>
          <table:table-cell table:style-name="TableRowCell" office:value-type="string">
            <text:p text:style-name="Table_20_Contents">রেটিং দিন</text:p>
          </table:table-cell>
        </table:table-row>
        <table:table-row>
          <table:table-cell table:style-name="TableRowCell" office:value-type="string">
            <text:p text:style-name="Table_20_Contents">পরিসংখ্যান</text:p>
          </table:table-cell>
          <table:table-cell table:style-name="TableRowCell" office:value-type="string">
            <text:p text:style-name="Table_20_Contents">GET</text:p>
          </table:table-cell>
          <table:table-cell table:style-name="TableRowCell" office:value-type="string">
            <text:p text:style-name="Table_20_Contents">/api/stats</text:p>
          </table:table-cell>
          <table:table-cell table:style-name="TableRowCell" office:value-type="string">
            <text:p text:style-name="Table_20_Contents">প্ল্যাটফর্ম পরিসংখ্যান</text:p>
          </table:table-cell>
        </table:table-row>
      </table:table>
      <text:p text:style-name="Horizontal_20_Line"/>
      <text:h text:style-name="Heading_20_2" text:outline-level="2"><text:bookmark-start text:name="ফলডর-কঠম-folder-structure"/>১০. ফোল্ডার কাঠামো (Folder Structure)<text:bookmark-end text:name="ফলডর-কঠম-folder-structure"/></text:h>
      <text:p text:style-name="P207">Blood Link/</text:p>
      <text:p text:style-name="P208">├── Blood-Drop_Server/ <text:s text:c="14"/># ব্যাকএন্ড সার্ভার</text:p>
      <text:p text:style-name="P209">│ <text:s text:c="2"/>├── config/</text:p>
      <text:p text:style-name="P210">│ <text:s text:c="2"/>│ <text:s text:c="2"/>└── db.js <text:s text:c="19"/># MongoDB কানেকশন</text:p>
      <text:p text:style-name="P211">│ <text:s text:c="2"/>├── controllers/</text:p>
      <text:p text:style-name="P212">│ <text:s text:c="2"/>│ <text:s text:c="2"/>└── chatController.js <text:s text:c="7"/># চ্যাট কন্ট্রোলার</text:p>
      <text:p text:style-name="P213">│ <text:s text:c="2"/>├── middleware/</text:p>
      <text:p text:style-name="P214">│ <text:s text:c="2"/>│ <text:s text:c="2"/>├── auth.js <text:s text:c="17"/># JWT অথেনটিকেশন</text:p>
      <text:p text:style-name="P215">│ <text:s text:c="2"/>│ <text:s text:c="2"/>├── adminAuth.js <text:s text:c="12"/># অ্যাডমিন অথেনটিকেশন</text:p>
      <text:p text:style-name="P216">│ <text:s text:c="2"/>│ <text:s text:c="2"/>└── errorHandler.js <text:s text:c="9"/># গ্লোবাল এরর হ্যান্ডলার</text:p>
      <text:p text:style-name="P217">│ <text:s text:c="2"/>├── models/</text:p>
      <text:p text:style-name="P218">│ <text:s text:c="2"/>│ <text:s text:c="2"/>├── User.js <text:s text:c="17"/># ব্যবহারকারী মডেল</text:p>
      <text:p text:style-name="P219">│ <text:s text:c="2"/>│ <text:s text:c="2"/>├── Request.js <text:s text:c="14"/># রক্তের অনুরোধ মডেল</text:p>
      <text:p text:style-name="P220">│ <text:s text:c="2"/>│ <text:s text:c="2"/>├── Conversation.js <text:s text:c="9"/># কনভারসেশন মডেল</text:p>
      <text:p text:style-name="P221">│ <text:s text:c="2"/>│ <text:s text:c="2"/>├── Message.js <text:s text:c="14"/># মেসেজ মডেল</text:p>
      <text:p text:style-name="P222">│ <text:s text:c="2"/>│ <text:s text:c="2"/>├── Notification.js <text:s text:c="9"/># নোটিফিকেশন মডেল</text:p>
      <text:p text:style-name="P223">│ <text:s text:c="2"/>│ <text:s text:c="2"/>├── FriendRequest.js <text:s text:c="8"/># বন্ধু রিকোয়েস্ট মডেল</text:p>
      <text:p text:style-name="P224">│ <text:s text:c="2"/>│ <text:s text:c="2"/>├── Bookmark.js <text:s text:c="13"/># বুকমার্ক মডেল</text:p>
      <text:p text:style-name="P225">│ <text:s text:c="2"/>│ <text:s text:c="2"/>├── DonationLog.js <text:s text:c="10"/># ডোনেশন লগ মডেল</text:p>
      <text:p text:style-name="P226">│ <text:s text:c="2"/>│ <text:s text:c="2"/>├── Feedback.js <text:s text:c="13"/># ফিডব্যাক মডেল</text:p>
      <text:p text:style-name="P227">│ <text:s text:c="2"/>│ <text:s text:c="2"/>└── Rating.js <text:s text:c="15"/># রেটিং মডেল</text:p>
      <text:p text:style-name="P228">│ <text:s text:c="2"/>├── routes/</text:p>
      <text:p text:style-name="P229">│ <text:s text:c="2"/>│ <text:s text:c="2"/>├── auth.js <text:s text:c="17"/># অথ রুট</text:p>
      <text:p text:style-name="P230">│ <text:s text:c="2"/>│ <text:s text:c="2"/>├── donors.js <text:s text:c="15"/># ডোনার রুট</text:p>
      <text:p text:style-name="P231">│ <text:s text:c="2"/>│ <text:s text:c="2"/>├── requests.js <text:s text:c="13"/># অনুরোধ রুট</text:p>
      <text:p text:style-name="P232">│ <text:s text:c="2"/>│ <text:s text:c="2"/>├── chat.js <text:s text:c="17"/># চ্যাট রুট</text:p>
      <text:p text:style-name="P233">│ <text:s text:c="2"/>│ <text:s text:c="2"/>├── friends.js <text:s text:c="14"/># বন্ধু রুট</text:p>
      <text:p text:style-name="P234">│ <text:s text:c="2"/>│ <text:s text:c="2"/>├── notifications.js <text:s text:c="8"/># নোটিফিকেশন রুট</text:p>
      <text:p text:style-name="P235">│ <text:s text:c="2"/>│ <text:s text:c="2"/>├── bookmarks.js <text:s text:c="12"/># বুকমার্ক রুট</text:p>
      <text:p text:style-name="P236">│ <text:s text:c="2"/>│ <text:s text:c="2"/>├── donationLogs.js <text:s text:c="9"/># ডোনেশন লগ রুট</text:p>
      <text:p text:style-name="P237">│ <text:s text:c="2"/>│ <text:s text:c="2"/>├── feedback.js <text:s text:c="13"/># ফিডব্যাক রুট</text:p>
      <text:p text:style-name="P238">│ <text:s text:c="2"/>│ <text:s text:c="2"/>├── ratings.js <text:s text:c="14"/># রেটিং রুট</text:p>
      <text:p text:style-name="P239">│ <text:s text:c="2"/>│ <text:s text:c="2"/>└── stats.js <text:s text:c="16"/># পরিসংখ্যান রুট</text:p>
      <text:p text:style-name="P240">│ <text:s text:c="2"/>├── socket/</text:p>
      <text:p text:style-name="P241">│ <text:s text:c="2"/>│ <text:s text:c="2"/>└── index.js <text:s text:c="16"/># Socket.IO ইভেন্ট হ্যান্ডলার</text:p>
      <text:p text:style-name="P242">│ <text:s text:c="2"/>├── utils/</text:p>
      <text:p text:style-name="P243">│ <text:s text:c="2"/>│ <text:s text:c="2"/>├── email.js <text:s text:c="16"/># ইমেইল সার্ভিস (Resend)</text:p>
      <text:p text:style-name="P244">│ <text:s text:c="2"/>│ <text:s text:c="2"/>├── validate.js <text:s text:c="13"/># ইনপুট ভ্যালিডেশন</text:p>
      <text:p text:style-name="P245">│ <text:s text:c="2"/>│ <text:s text:c="2"/>└── seedDonors.js <text:s text:c="11"/># ডেমো ডেটা সিডিং</text:p>
      <text:p text:style-name="P246">│ <text:s text:c="2"/>├── .env <text:s text:c="24"/># এনভায়রনমেন্ট ভেরিয়েবল</text:p>
      <text:p text:style-name="P247">│ <text:s text:c="2"/>├── package.json <text:s text:c="16"/># ডিপেন্ডেন্সি</text:p>
      <text:p text:style-name="P248">│ <text:s text:c="2"/>└── server.js <text:s text:c="19"/># মেইন এন্ট্রি পয়েন্ট</text:p>
      <text:p text:style-name="P249">│</text:p>
      <text:p text:style-name="P250">├── client/ <text:s text:c="25"/># ফ্রন্টএন্ড</text:p>
      <text:p text:style-name="P251">│ <text:s text:c="2"/>├── public/</text:p>
      <text:p text:style-name="P252">│ <text:s text:c="2"/>│ <text:s text:c="2"/>└── banner*.png <text:s text:c="13"/># ব্যানার ইমেজ</text:p>
      <text:p text:style-name="P253">│ <text:s text:c="2"/>├── src/</text:p>
      <text:p text:style-name="P254">│ <text:s text:c="2"/>│ <text:s text:c="2"/>├── components/</text:p>
      <text:p text:style-name="P255">│ <text:s text:c="2"/>│ <text:s text:c="2"/>│ <text:s text:c="2"/>├── chat/ <text:s text:c="15"/># চ্যাট কম্পোনেন্ট</text:p>
      <text:p text:style-name="P256">│ <text:s text:c="2"/>│ <text:s text:c="2"/>│ <text:s text:c="2"/>│ <text:s text:c="2"/>├── ChatHeader.jsx</text:p>
      <text:p text:style-name="P257">│ <text:s text:c="2"/>│ <text:s text:c="2"/>│ <text:s text:c="2"/>│ <text:s text:c="2"/>├── ChatInput.jsx</text:p>
      <text:p text:style-name="P258">│ <text:s text:c="2"/>│ <text:s text:c="2"/>│ <text:s text:c="2"/>│ <text:s text:c="2"/>├── ChatMessage.jsx</text:p>
      <text:p text:style-name="P259">│ <text:s text:c="2"/>│ <text:s text:c="2"/>│ <text:s text:c="2"/>│ <text:s text:c="2"/>├── ConversationList.jsx</text:p>
      <text:p text:style-name="P260">│ <text:s text:c="2"/>│ <text:s text:c="2"/>│ <text:s text:c="2"/>│ <text:s text:c="2"/>└── EmptyChat.jsx</text:p>
      <text:p text:style-name="P261">│ <text:s text:c="2"/>│ <text:s text:c="2"/>│ <text:s text:c="2"/>├── layout/</text:p>
      <text:p text:style-name="P262">│ <text:s text:c="2"/>│ <text:s text:c="2"/>│ <text:s text:c="2"/>│ <text:s text:c="2"/>├── Navbar.jsx</text:p>
      <text:p text:style-name="P263">│ <text:s text:c="2"/>│ <text:s text:c="2"/>│ <text:s text:c="2"/>│ <text:s text:c="2"/>└── Footer.jsx</text:p>
      <text:p text:style-name="P264">│ <text:s text:c="2"/>│ <text:s text:c="2"/>│ <text:s text:c="2"/>└── ui/</text:p>
      <text:p text:style-name="P265">│ <text:s text:c="2"/>│ <text:s text:c="2"/>│ <text:s text:c="6"/>├── LoadingAnimation.jsx</text:p>
      <text:p text:style-name="P266">│ <text:s text:c="2"/>│ <text:s text:c="2"/>│ <text:s text:c="6"/>└── Pagination.jsx</text:p>
      <text:p text:style-name="P267">│ <text:s text:c="2"/>│ <text:s text:c="2"/>├── context/</text:p>
      <text:p text:style-name="P268">│ <text:s text:c="2"/>│ <text:s text:c="2"/>│ <text:s text:c="2"/>├── AuthContext.jsx <text:s text:c="5"/># অথ কনটেক্সট</text:p>
      <text:p text:style-name="P269">│ <text:s text:c="2"/>│ <text:s text:c="2"/>│ <text:s text:c="2"/>├── ChatContext.jsx <text:s text:c="5"/># চ্যাট কনটেক্সট</text:p>
      <text:p text:style-name="P270">│ <text:s text:c="2"/>│ <text:s text:c="2"/>│ <text:s text:c="2"/>└── ThemeContext.jsx <text:s text:c="4"/># থিম কনটেক্সট</text:p>
      <text:p text:style-name="P271">│ <text:s text:c="2"/>│ <text:s text:c="2"/>├── data/</text:p>
      <text:p text:style-name="P272">│ <text:s text:c="2"/>│ <text:s text:c="2"/>│ <text:s text:c="2"/>├── constants.js <text:s text:c="8"/># ধ্রুবক ও ডেটা</text:p>
      <text:p text:style-name="P273">│ <text:s text:c="2"/>│ <text:s text:c="2"/>│ <text:s text:c="2"/>└── donors.json <text:s text:c="9"/># ১৫০+ ডেমো ডোনার</text:p>
      <text:p text:style-name="P274">│ <text:s text:c="2"/>│ <text:s text:c="2"/>├── hooks/</text:p>
      <text:p text:style-name="P275">│ <text:s text:c="2"/>│ <text:s text:c="2"/>│ <text:s text:c="2"/>└── useSocket.js <text:s text:c="8"/># Socket.IO হুক</text:p>
      <text:p text:style-name="P276">│ <text:s text:c="2"/>│ <text:s text:c="2"/>├── pages/</text:p>
      <text:p text:style-name="P277">│ <text:s text:c="2"/>│ <text:s text:c="2"/>│ <text:s text:c="2"/>├── home/</text:p>
      <text:p text:style-name="P278">│ <text:s text:c="2"/>│ <text:s text:c="2"/>│ <text:s text:c="2"/>│ <text:s text:c="2"/>└── LandingPage.jsx</text:p>
      <text:p text:style-name="P279">│ <text:s text:c="2"/>│ <text:s text:c="2"/>│ <text:s text:c="2"/>├── donor/</text:p>
      <text:p text:style-name="P280">│ <text:s text:c="2"/>│ <text:s text:c="2"/>│ <text:s text:c="2"/>│ <text:s text:c="2"/>├── DonorSearchPage.jsx</text:p>
      <text:p text:style-name="P281">│ <text:s text:c="2"/>│ <text:s text:c="2"/>│ <text:s text:c="2"/>│ <text:s text:c="2"/>└── DonorProfilePage.jsx</text:p>
      <text:p text:style-name="P282">│ <text:s text:c="2"/>│ <text:s text:c="2"/>│ <text:s text:c="2"/>├── blood-request/</text:p>
      <text:p text:style-name="P283">│ <text:s text:c="2"/>│ <text:s text:c="2"/>│ <text:s text:c="2"/>│ <text:s text:c="2"/>├── RequestListPage.jsx</text:p>
      <text:p text:style-name="P284">│ <text:s text:c="2"/>│ <text:s text:c="2"/>│ <text:s text:c="2"/>│ <text:s text:c="2"/>├── RequestDetailPage.jsx</text:p>
      <text:p text:style-name="P285">│ <text:s text:c="2"/>│ <text:s text:c="2"/>│ <text:s text:c="2"/>│ <text:s text:c="2"/>└── CreateRequestPage.jsx</text:p>
      <text:p text:style-name="P286">│ <text:s text:c="2"/>│ <text:s text:c="2"/>│ <text:s text:c="2"/>├── chat/</text:p>
      <text:p text:style-name="P287">│ <text:s text:c="2"/>│ <text:s text:c="2"/>│ <text:s text:c="2"/>│ <text:s text:c="2"/>└── ChatPage.jsx</text:p>
      <text:p text:style-name="P288">│ <text:s text:c="2"/>│ <text:s text:c="2"/>│ <text:s text:c="2"/>├── connect/</text:p>
      <text:p text:style-name="P289">│ <text:s text:c="2"/>│ <text:s text:c="2"/>│ <text:s text:c="2"/>│ <text:s text:c="2"/>└── ConnectPage.jsx</text:p>
      <text:p text:style-name="P290">│ <text:s text:c="2"/>│ <text:s text:c="2"/>│ <text:s text:c="2"/>├── dashboard/</text:p>
      <text:p text:style-name="P291">│ <text:s text:c="2"/>│ <text:s text:c="2"/>│ <text:s text:c="2"/>│ <text:s text:c="2"/>└── DashboardPage.jsx</text:p>
      <text:p text:style-name="P292">│ <text:s text:c="2"/>│ <text:s text:c="2"/>│ <text:s text:c="2"/>├── leaderboard/</text:p>
      <text:p text:style-name="P293">│ <text:s text:c="2"/>│ <text:s text:c="2"/>│ <text:s text:c="2"/>│ <text:s text:c="2"/>└── LeaderboardPage.jsx</text:p>
      <text:p text:style-name="P294">│ <text:s text:c="2"/>│ <text:s text:c="2"/>│ <text:s text:c="2"/>├── bookmarks/</text:p>
      <text:p text:style-name="P295">│ <text:s text:c="2"/>│ <text:s text:c="2"/>│ <text:s text:c="2"/>│ <text:s text:c="2"/>└── BookmarksPage.jsx</text:p>
      <text:p text:style-name="P296">│ <text:s text:c="2"/>│ <text:s text:c="2"/>│ <text:s text:c="2"/>├── admin/</text:p>
      <text:p text:style-name="P297">│ <text:s text:c="2"/>│ <text:s text:c="2"/>│ <text:s text:c="2"/>│ <text:s text:c="2"/>└── AdminDashboardPage.jsx</text:p>
      <text:p text:style-name="P298">│ <text:s text:c="2"/>│ <text:s text:c="2"/>│ <text:s text:c="2"/>├── health/</text:p>
      <text:p text:style-name="P299">│ <text:s text:c="2"/>│ <text:s text:c="2"/>│ <text:s text:c="2"/>│ <text:s text:c="2"/>└── HealthHubPage.jsx</text:p>
      <text:p text:style-name="P300">│ <text:s text:c="2"/>│ <text:s text:c="2"/>│ <text:s text:c="2"/>├── auth/</text:p>
      <text:p text:style-name="P301">│ <text:s text:c="2"/>│ <text:s text:c="2"/>│ <text:s text:c="2"/>│ <text:s text:c="2"/>├── LoginPage.jsx</text:p>
      <text:p text:style-name="P302">│ <text:s text:c="2"/>│ <text:s text:c="2"/>│ <text:s text:c="2"/>│ <text:s text:c="2"/>└── RegisterPage.jsx</text:p>
      <text:p text:style-name="P303">│ <text:s text:c="2"/>│ <text:s text:c="2"/>│ <text:s text:c="2"/>└── profile/</text:p>
      <text:p text:style-name="P304">│ <text:s text:c="2"/>│ <text:s text:c="2"/>│ <text:s text:c="6"/>├── ProfilePage.jsx</text:p>
      <text:p text:style-name="P305">│ <text:s text:c="2"/>│ <text:s text:c="2"/>│ <text:s text:c="6"/>├── SettingsPage.jsx</text:p>
      <text:p text:style-name="P306">│ <text:s text:c="2"/>│ <text:s text:c="2"/>│ <text:s text:c="6"/>└── NotificationsPage.jsx</text:p>
      <text:p text:style-name="P307">│ <text:s text:c="2"/>│ <text:s text:c="2"/>├── services/</text:p>
      <text:p text:style-name="P308">│ <text:s text:c="2"/>│ <text:s text:c="2"/>│ <text:s text:c="2"/>├── api.js <text:s text:c="14"/># Axios ইনস্ট্যান্স</text:p>
      <text:p text:style-name="P309">│ <text:s text:c="2"/>│ <text:s text:c="2"/>│ <text:s text:c="2"/>├── localStore.js <text:s text:c="7"/># API ডেটা ফাংশন</text:p>
      <text:p text:style-name="P310">│ <text:s text:c="2"/>│ <text:s text:c="2"/>│ <text:s text:c="2"/>├── friendService.js <text:s text:c="4"/># বন্ধু সার্ভিস</text:p>
      <text:p text:style-name="P311">│ <text:s text:c="2"/>│ <text:s text:c="2"/>│ <text:s text:c="2"/>└── chatService.js <text:s text:c="6"/># চ্যাট সার্ভিস</text:p>
      <text:p text:style-name="P312">│ <text:s text:c="2"/>│ <text:s text:c="2"/>├── styles/</text:p>
      <text:p text:style-name="P313">│ <text:s text:c="2"/>│ <text:s text:c="2"/>│ <text:s text:c="2"/>└── index.css <text:s text:c="11"/># ৩,১৮৩ লাইন CSS</text:p>
      <text:p text:style-name="P314">│ <text:s text:c="2"/>│ <text:s text:c="2"/>├── utils/</text:p>
      <text:p text:style-name="P315">│ <text:s text:c="2"/>│ <text:s text:c="2"/>│ <text:s text:c="2"/>└── validate.js <text:s text:c="9"/># ক্লায়েন্ট-সাইড ভ্যালিডেশন</text:p>
      <text:p text:style-name="P316">│ <text:s text:c="2"/>│ <text:s text:c="2"/>├── App.jsx <text:s text:c="17"/># মেইন রুটিং</text:p>
      <text:p text:style-name="P317">│ <text:s text:c="2"/>│ <text:s text:c="2"/>└── main.jsx <text:s text:c="16"/># রিয়্যাক্ট এন্ট্রি</text:p>
      <text:p text:style-name="P318">│ <text:s text:c="2"/>├── .env <text:s text:c="24"/># VITE_API_URL</text:p>
      <text:p text:style-name="P319">│ <text:s text:c="2"/>├── package.json</text:p>
      <text:p text:style-name="P320">│ <text:s text:c="2"/>└── vite.config.js</text:p>
      <text:p text:style-name="P321">│</text:p>
      <text:p text:style-name="P322">├── README.md</text:p>
      <text:p text:style-name="P323">├── TECHNICAL_DOCUMENTATION.txt</text:p>
      <text:p text:style-name="P324">└── vercel.json <text:s text:c="21"/># Vercel ডিপ্লয়মেন্ট</text:p>
      <text:p text:style-name="Horizontal_20_Line"/>
      <text:h text:style-name="Heading_20_2" text:outline-level="2"><text:bookmark-start text:name="পরকষ-নরকষ-testing"/>১১. পরীক্ষা-নিরীক্ষা (Testing)<text:bookmark-end text:name="পরকষ-নরকষ-testing"/></text:h>
      <text:h text:style-name="Heading_20_3" text:outline-level="3"><text:bookmark-start text:name="ফশনল-টসট"/>১১.১ ফাংশনাল টেস্টিং<text:bookmark-end text:name="ফশনল-টসট"/></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ক্রমিক</text:p>
            </table:table-cell>
            <table:table-cell table:style-name="TableHeaderRowCell" office:value-type="string">
              <text:p text:style-name="Table_20_Heading">টেস্ট কেস</text:p>
            </table:table-cell>
            <table:table-cell table:style-name="TableHeaderRowCell" office:value-type="string">
              <text:p text:style-name="Table_20_Heading">প্রত্যাশিত ফলাফল</text:p>
            </table:table-cell>
            <table:table-cell table:style-name="TableHeaderRowCell" office:value-type="string">
              <text:p text:style-name="Table_20_Heading">আসল ফলাফল</text:p>
            </table:table-cell>
            <table:table-cell table:style-name="TableHeaderRowCell" office:value-type="string">
              <text:p text:style-name="Table_20_Heading">স্ট্যাটাস</text:p>
            </table:table-cell>
          </table:table-row>
        </table:table-header-rows>
        <table:table-row>
          <table:table-cell table:style-name="TableRowCell" office:value-type="string">
            <text:p text:style-name="Table_20_Contents">১</text:p>
          </table:table-cell>
          <table:table-cell table:style-name="TableRowCell" office:value-type="string">
            <text:p text:style-name="Table_20_Contents">বৈধ ইমেইল ও পাসওয়ার্ড দিয়ে লগইন</text:p>
          </table:table-cell>
          <table:table-cell table:style-name="TableRowCell" office:value-type="string">
            <text:p text:style-name="Table_20_Contents">ড্যাশবোর্ডে রিডাইরেক্ট</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২</text:p>
          </table:table-cell>
          <table:table-cell table:style-name="TableRowCell" office:value-type="string">
            <text:p text:style-name="Table_20_Contents">অবৈধ পাসওয়ার্ড দিয়ে লগইন</text:p>
          </table:table-cell>
          <table:table-cell table:style-name="TableRowCell" office:value-type="string">
            <text:p text:style-name="Table_20_Contents">এরর টোস্ট দেখা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৩</text:p>
          </table:table-cell>
          <table:table-cell table:style-name="TableRowCell" office:value-type="string">
            <text:p text:style-name="Table_20_Contents">নতুন ব্যবহারকারী নিবন্ধন</text:p>
          </table:table-cell>
          <table:table-cell table:style-name="TableRowCell" office:value-type="string">
            <text:p text:style-name="Table_20_Contents">সফলভাবে নিবন্ধিত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৪</text:p>
          </table:table-cell>
          <table:table-cell table:style-name="TableRowCell" office:value-type="string">
            <text:p text:style-name="Table_20_Contents">ডুপ্লিকেট ইমেইলে নিবন্ধন</text:p>
          </table:table-cell>
          <table:table-cell table:style-name="TableRowCell" office:value-type="string">
            <text:p text:style-name="Table_20_Contents">এরর টোস্ট দেখা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৫</text:p>
          </table:table-cell>
          <table:table-cell table:style-name="TableRowCell" office:value-type="string">
            <text:p text:style-name="Table_20_Contents">রক্তের ধরন দিয়ে ডোনার সার্চ</text:p>
          </table:table-cell>
          <table:table-cell table:style-name="TableRowCell" office:value-type="string">
            <text:p text:style-name="Table_20_Contents">মিলিয়ে যাওয়া ডোনার দেখা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৬</text:p>
          </table:table-cell>
          <table:table-cell table:style-name="TableRowCell" office:value-type="string">
            <text:p text:style-name="Table_20_Contents">জিওলোকেশন সার্চ</text:p>
          </table:table-cell>
          <table:table-cell table:style-name="TableRowCell" office:value-type="string">
            <text:p text:style-name="Table_20_Contents">কাছের ডোনার দেখা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৭</text:p>
          </table:table-cell>
          <table:table-cell table:style-name="TableRowCell" office:value-type="string">
            <text:p text:style-name="Table_20_Contents">রক্তের অনুরোধ তৈরি</text:p>
          </table:table-cell>
          <table:table-cell table:style-name="TableRowCell" office:value-type="string">
            <text:p text:style-name="Table_20_Contents">অনুরোধ সফলভাবে তৈরি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৮</text:p>
          </table:table-cell>
          <table:table-cell table:style-name="TableRowCell" office:value-type="string">
            <text:p text:style-name="Table_20_Contents">অনুরোধ গ্রহণ</text:p>
          </table:table-cell>
          <table:table-cell table:style-name="TableRowCell" office:value-type="string">
            <text:p text:style-name="Table_20_Contents">স্ট্যাটাস “accepted”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৯</text:p>
          </table:table-cell>
          <table:table-cell table:style-name="TableRowCell" office:value-type="string">
            <text:p text:style-name="Table_20_Contents">অনুরোধ সম্পূর্ণ</text:p>
          </table:table-cell>
          <table:table-cell table:style-name="TableRowCell" office:value-type="string">
            <text:p text:style-name="Table_20_Contents">স্ট্যাটাস “completed”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১০</text:p>
          </table:table-cell>
          <table:table-cell table:style-name="TableRowCell" office:value-type="string">
            <text:p text:style-name="Table_20_Contents">রিয়েল-টাইম মেসেজ পাঠানো</text:p>
          </table:table-cell>
          <table:table-cell table:style-name="TableRowCell" office:value-type="string">
            <text:p text:style-name="Table_20_Contents">মেসেজ তাৎক্ষণিক দৃশ্যমান</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১১</text:p>
          </table:table-cell>
          <table:table-cell table:style-name="TableRowCell" office:value-type="string">
            <text:p text:style-name="Table_20_Contents">টাইপিং ইন্ডিকেটর</text:p>
          </table:table-cell>
          <table:table-cell table:style-name="TableRowCell" office:value-type="string">
            <text:p text:style-name="Table_20_Contents">“টাইপ করছে…” দেখা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১২</text:p>
          </table:table-cell>
          <table:table-cell table:style-name="TableRowCell" office:value-type="string">
            <text:p text:style-name="Table_20_Contents">মেসেজ সিন (read receipt)</text:p>
          </table:table-cell>
          <table:table-cell table:style-name="TableRowCell" office:value-type="string">
            <text:p text:style-name="Table_20_Contents">ডাবল চেকমার্ক দেখা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১৩</text:p>
          </table:table-cell>
          <table:table-cell table:style-name="TableRowCell" office:value-type="string">
            <text:p text:style-name="Table_20_Contents">বন্ধু রিকোয়েস্ট পাঠানো</text:p>
          </table:table-cell>
          <table:table-cell table:style-name="TableRowCell" office:value-type="string">
            <text:p text:style-name="Table_20_Contents">রিকোয়েস্ট পাঠানো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১৪</text:p>
          </table:table-cell>
          <table:table-cell table:style-name="TableRowCell" office:value-type="string">
            <text:p text:style-name="Table_20_Contents">বন্ধু রিকোয়েস্ট গ্রহণ</text:p>
          </table:table-cell>
          <table:table-cell table:style-name="TableRowCell" office:value-type="string">
            <text:p text:style-name="Table_20_Contents">কানেকশন তৈরি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১৫</text:p>
          </table:table-cell>
          <table:table-cell table:style-name="TableRowCell" office:value-type="string">
            <text:p text:style-name="Table_20_Contents">বুকমার্ক যোগ</text:p>
          </table:table-cell>
          <table:table-cell table:style-name="TableRowCell" office:value-type="string">
            <text:p text:style-name="Table_20_Contents">ডোনার বুকমার্ক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১৬</text:p>
          </table:table-cell>
          <table:table-cell table:style-name="TableRowCell" office:value-type="string">
            <text:p text:style-name="Table_20_Contents">বুকমার্ক মুছুন</text:p>
          </table:table-cell>
          <table:table-cell table:style-name="TableRowCell" office:value-type="string">
            <text:p text:style-name="Table_20_Contents">বুকমার্ক সরিয়ে ফেলা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১৭</text:p>
          </table:table-cell>
          <table:table-cell table:style-name="TableRowCell" office:value-type="string">
            <text:p text:style-name="Table_20_Contents">ডোনেশন লগ যোগ</text:p>
          </table:table-cell>
          <table:table-cell table:style-name="TableRowCell" office:value-type="string">
            <text:p text:style-name="Table_20_Contents">রক্তদানের ইতিহাস সংরক্ষিত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১৮</text:p>
          </table:table-cell>
          <table:table-cell table:style-name="TableRowCell" office:value-type="string">
            <text:p text:style-name="Table_20_Contents">ফিডব্যাক সাবমিট</text:p>
          </table:table-cell>
          <table:table-cell table:style-name="TableRowCell" office:value-type="string">
            <text:p text:style-name="Table_20_Contents">ফিডব্যাক সংরক্ষিত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১৯</text:p>
          </table:table-cell>
          <table:table-cell table:style-name="TableRowCell" office:value-type="string">
            <text:p text:style-name="Table_20_Contents">রেটিং সাবমিট</text:p>
          </table:table-cell>
          <table:table-cell table:style-name="TableRowCell" office:value-type="string">
            <text:p text:style-name="Table_20_Contents">রেটিং সংরক্ষিত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২০</text:p>
          </table:table-cell>
          <table:table-cell table:style-name="TableRowCell" office:value-type="string">
            <text:p text:style-name="Table_20_Contents">থিম টগল (ডার্ক/লাইট)</text:p>
          </table:table-cell>
          <table:table-cell table:style-name="TableRowCell" office:value-type="string">
            <text:p text:style-name="Table_20_Contents">থিম পরিবর্তন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২১</text:p>
          </table:table-cell>
          <table:table-cell table:style-name="TableRowCell" office:value-type="string">
            <text:p text:style-name="Table_20_Contents">প্রোফাইল আপডেট</text:p>
          </table:table-cell>
          <table:table-cell table:style-name="TableRowCell" office:value-type="string">
            <text:p text:style-name="Table_20_Contents">তথ্য সফলভাবে আপডেট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২২</text:p>
          </table:table-cell>
          <table:table-cell table:style-name="TableRowCell" office:value-type="string">
            <text:p text:style-name="Table_20_Contents">অনুরোধ মুছুন</text:p>
          </table:table-cell>
          <table:table-cell table:style-name="TableRowCell" office:value-type="string">
            <text:p text:style-name="Table_20_Contents">অনুরোধ মুছে ফেলা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২৩</text:p>
          </table:table-cell>
          <table:table-cell table:style-name="TableRowCell" office:value-type="string">
            <text:p text:style-name="Table_20_Contents">মেসেজ মুছুন</text:p>
          </table:table-cell>
          <table:table-cell table:style-name="TableRowCell" office:value-type="string">
            <text:p text:style-name="Table_20_Contents">মেসেজ মুছে ফেলা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row>
          <table:table-cell table:style-name="TableRowCell" office:value-type="string">
            <text:p text:style-name="Table_20_Contents">২৪</text:p>
          </table:table-cell>
          <table:table-cell table:style-name="TableRowCell" office:value-type="string">
            <text:p text:style-name="Table_20_Contents">নোটিফিকেশন পড়ুন</text:p>
          </table:table-cell>
          <table:table-cell table:style-name="TableRowCell" office:value-type="string">
            <text:p text:style-name="Table_20_Contents">নোটিফিকেশন মার্ক হয়</text:p>
          </table:table-cell>
          <table:table-cell table:style-name="TableRowCell" office:value-type="string">
            <text:p text:style-name="Table_20_Contents">সফল</text:p>
          </table:table-cell>
          <table:table-cell table:style-name="TableRowCell" office:value-type="string">
            <text:p text:style-name="Table_20_Contents">✅</text:p>
          </table:table-cell>
        </table:table-row>
      </table:table>
      <text:h text:style-name="Heading_20_3" text:outline-level="3"><text:bookmark-start text:name="uiux-পরকষ"/>১১.২ UI/UX পরীক্ষা<text:bookmark-end text:name="uiux-পরকষ"/></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ক্রমিক</text:p>
            </table:table-cell>
            <table:table-cell table:style-name="TableHeaderRowCell" office:value-type="string">
              <text:p text:style-name="Table_20_Heading">পরীক্ষার বিষয়</text:p>
            </table:table-cell>
            <table:table-cell table:style-name="TableHeaderRowCell" office:value-type="string">
              <text:p text:style-name="Table_20_Heading">ফলাফল</text:p>
            </table:table-cell>
          </table:table-row>
        </table:table-header-rows>
        <table:table-row>
          <table:table-cell table:style-name="TableRowCell" office:value-type="string">
            <text:p text:style-name="Table_20_Contents">১</text:p>
          </table:table-cell>
          <table:table-cell table:style-name="TableRowCell" office:value-type="string">
            <text:p text:style-name="Table_20_Contents">মোবাইল রেসপন্সিভনেস</text:p>
          </table:table-cell>
          <table:table-cell table:style-name="TableRowCell" office:value-type="string">
            <text:p text:style-name="Table_20_Contents">সকল পৃষ্ঠা মোবাইলে সঠিকভাবে প্রদর্শিত হয়</text:p>
          </table:table-cell>
        </table:table-row>
        <table:table-row>
          <table:table-cell table:style-name="TableRowCell" office:value-type="string">
            <text:p text:style-name="Table_20_Contents">২</text:p>
          </table:table-cell>
          <table:table-cell table:style-name="TableRowCell" office:value-type="string">
            <text:p text:style-name="Table_20_Contents">ডার্ক মোড</text:p>
          </table:table-cell>
          <table:table-cell table:style-name="TableRowCell" office:value-type="string">
            <text:p text:style-name="Table_20_Contents">ডার্ক মোডে সকল টেক্সট ও ব্যাকগ্রাউন্ড সঠিক</text:p>
          </table:table-cell>
        </table:table-row>
        <table:table-row>
          <table:table-cell table:style-name="TableRowCell" office:value-type="string">
            <text:p text:style-name="Table_20_Contents">৩</text:p>
          </table:table-cell>
          <table:table-cell table:style-name="TableRowCell" office:value-type="string">
            <text:p text:style-name="Table_20_Contents">3D কার্ড অ্যানিমেশন</text:p>
          </table:table-cell>
          <table:table-cell table:style-name="TableRowCell" office:value-type="string">
            <text:p text:style-name="Table_20_Contents">মাউস হোভারে 3D ইফেক্ট কাজ করে</text:p>
          </table:table-cell>
        </table:table-row>
        <table:table-row>
          <table:table-cell table:style-name="TableRowCell" office:value-type="string">
            <text:p text:style-name="Table_20_Contents">৪</text:p>
          </table:table-cell>
          <table:table-cell table:style-name="TableRowCell" office:value-type="string">
            <text:p text:style-name="Table_20_Contents">টোস্ট নোটিফিকেশন</text:p>
          </table:table-cell>
          <table:table-cell table:style-name="TableRowCell" office:value-type="string">
            <text:p text:style-name="Table_20_Contents">সঠিক সময়ে সঠিক বার্তা প্রদর্শিত হয়</text:p>
          </table:table-cell>
        </table:table-row>
        <table:table-row>
          <table:table-cell table:style-name="TableRowCell" office:value-type="string">
            <text:p text:style-name="Table_20_Contents">৫</text:p>
          </table:table-cell>
          <table:table-cell table:style-name="TableRowCell" office:value-type="string">
            <text:p text:style-name="Table_20_Contents">পেজিনেশন</text:p>
          </table:table-cell>
          <table:table-cell table:style-name="TableRowCell" office:value-type="string">
            <text:p text:style-name="Table_20_Contents">সঠিকভাবে পৃষ্ঠা পরিবর্তন হয়</text:p>
          </table:table-cell>
        </table:table-row>
        <table:table-row>
          <table:table-cell table:style-name="TableRowCell" office:value-type="string">
            <text:p text:style-name="Table_20_Contents">৬</text:p>
          </table:table-cell>
          <table:table-cell table:style-name="TableRowCell" office:value-type="string">
            <text:p text:style-name="Table_20_Contents">ফর্ম ভ্যালিডেশন</text:p>
          </table:table-cell>
          <table:table-cell table:style-name="TableRowCell" office:value-type="string">
            <text:p text:style-name="Table_20_Contents">ভুল তথ্যে সঠিক এরর বার্তা দেখায়</text:p>
          </table:table-cell>
        </table:table-row>
      </table:table>
      <text:h text:style-name="Heading_20_3" text:outline-level="3"><text:bookmark-start text:name="নরপতত-পরকষ"/>১১.৩ নিরাপত্তা পরীক্ষা<text:bookmark-end text:name="নরপতত-পরকষ"/></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ক্রমিক</text:p>
            </table:table-cell>
            <table:table-cell table:style-name="TableHeaderRowCell" office:value-type="string">
              <text:p text:style-name="Table_20_Heading">পরীক্ষার বিষয়</text:p>
            </table:table-cell>
            <table:table-cell table:style-name="TableHeaderRowCell" office:value-type="string">
              <text:p text:style-name="Table_20_Heading">ফলাফল</text:p>
            </table:table-cell>
          </table:table-row>
        </table:table-header-rows>
        <table:table-row>
          <table:table-cell table:style-name="TableRowCell" office:value-type="string">
            <text:p text:style-name="Table_20_Contents">১</text:p>
          </table:table-cell>
          <table:table-cell table:style-name="TableRowCell" office:value-type="string">
            <text:p text:style-name="Table_20_Contents">পাসওয়ার্ড হ্যাশিং</text:p>
          </table:table-cell>
          <table:table-cell table:style-name="TableRowCell" office:value-type="string">
            <text:p text:style-name="Table_20_Contents">bcrypt দিয়ে হ্যাশ করা হয়েছে</text:p>
          </table:table-cell>
        </table:table-row>
        <table:table-row>
          <table:table-cell table:style-name="TableRowCell" office:value-type="string">
            <text:p text:style-name="Table_20_Contents">২</text:p>
          </table:table-cell>
          <table:table-cell table:style-name="TableRowCell" office:value-type="string">
            <text:p text:style-name="Table_20_Contents">JWT টোকেন ভেরিফিকেশন</text:p>
          </table:table-cell>
          <table:table-cell table:style-name="TableRowCell" office:value-type="string">
            <text:p text:style-name="Table_20_Contents">অবৈধ টোকেনে 401 রিটার্ন হয়</text:p>
          </table:table-cell>
        </table:table-row>
        <table:table-row>
          <table:table-cell table:style-name="TableRowCell" office:value-type="string">
            <text:p text:style-name="Table_20_Contents">৩</text:p>
          </table:table-cell>
          <table:table-cell table:style-name="TableRowCell" office:value-type="string">
            <text:p text:style-name="Table_20_Contents">CORS</text:p>
          </table:table-cell>
          <table:table-cell table:style-name="TableRowCell" office:value-type="string">
            <text:p text:style-name="Table_20_Contents">শুধুমাত্র অনুমোদিত উৎস থেকে রিকোয়েস্ট গৃহীত হয়</text:p>
          </table:table-cell>
        </table:table-row>
        <table:table-row>
          <table:table-cell table:style-name="TableRowCell" office:value-type="string">
            <text:p text:style-name="Table_20_Contents">৪</text:p>
          </table:table-cell>
          <table:table-cell table:style-name="TableRowCell" office:value-type="string">
            <text:p text:style-name="Table_20_Contents">ইনপুট ভ্যালিডেশন</text:p>
          </table:table-cell>
          <table:table-cell table:style-name="TableRowCell" office:value-type="string">
            <text:p text:style-name="Table_20_Contents">সকল ফর্মে ক্লায়েন্ট + সার্ভার ভ্যালিডেশন</text:p>
          </table:table-cell>
        </table:table-row>
        <table:table-row>
          <table:table-cell table:style-name="TableRowCell" office:value-type="string">
            <text:p text:style-name="Table_20_Contents">৫</text:p>
          </table:table-cell>
          <table:table-cell table:style-name="TableRowCell" office:value-type="string">
            <text:p text:style-name="Table_20_Contents">অথরাইজেশন</text:p>
          </table:table-cell>
          <table:table-cell table:style-name="TableRowCell" office:value-type="string">
            <text:p text:style-name="Table_20_Contents">শুধুমাত্র নিজের ডেটা পরিবর্তন করা যায়</text:p>
          </table:table-cell>
        </table:table-row>
      </table:table>
      <text:p text:style-name="Horizontal_20_Line"/>
      <text:h text:style-name="Heading_20_2" text:outline-level="2"><text:bookmark-start text:name="চযলঞজ-ও-সমবদধত-challenges-limitations"/>১২. চ্যালেঞ্জ ও সীমাবদ্ধতা (Challenges &amp; Limitations)<text:bookmark-end text:name="চযলঞজ-ও-সমবদধত-challenges-limitations"/></text:h>
      <text:h text:style-name="Heading_20_3" text:outline-level="3"><text:bookmark-start text:name="চযলঞস"/>১২.১ চ্যালেঞ্স<text:bookmark-end text:name="চযলঞস"/></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ক্রমিক</text:p>
            </table:table-cell>
            <table:table-cell table:style-name="TableHeaderRowCell" office:value-type="string">
              <text:p text:style-name="Table_20_Heading">চ্যালেঞ্জ</text:p>
            </table:table-cell>
            <table:table-cell table:style-name="TableHeaderRowCell" office:value-type="string">
              <text:p text:style-name="Table_20_Heading">সমাধান</text:p>
            </table:table-cell>
          </table:table-row>
        </table:table-header-rows>
        <table:table-row>
          <table:table-cell table:style-name="TableRowCell" office:value-type="string">
            <text:p text:style-name="Table_20_Contents">১</text:p>
          </table:table-cell>
          <table:table-cell table:style-name="TableRowCell" office:value-type="string">
            <text:p text:style-name="Table_20_Contents">Socket.IO কানেকশন ম্যানেজমেন্ট</text:p>
          </table:table-cell>
          <table:table-cell table:style-name="TableRowCell" office:value-type="string">
            <text:p text:style-name="Table_20_Contents">একাধিক ডিভাইসে একই ইউজারের কানেকশন হ্যান্ডল করা</text:p>
          </table:table-cell>
        </table:table-row>
        <table:table-row>
          <table:table-cell table:style-name="TableRowCell" office:value-type="string">
            <text:p text:style-name="Table_20_Contents">২</text:p>
          </table:table-cell>
          <table:table-cell table:style-name="TableRowCell" office:value-type="string">
            <text:p text:style-name="Table_20_Contents">ইমেজ আপলোড সাইজ</text:p>
          </table:table-cell>
          <table:table-cell table:style-name="TableRowCell" office:value-type="string">
            <text:p text:style-name="Table_20_Contents">base64 এনকোডিং 5MB লিমিট, 2MB সীমা প্রয়োগ</text:p>
          </table:table-cell>
        </table:table-row>
        <table:table-row>
          <table:table-cell table:style-name="TableRowCell" office:value-type="string">
            <text:p text:style-name="Table_20_Contents">৩</text:p>
          </table:table-cell>
          <table:table-cell table:style-name="TableRowCell" office:value-type="string">
            <text:p text:style-name="Table_20_Contents">রিয়েল-টাইম সিঙ্ক</text:p>
          </table:table-cell>
          <table:table-cell table:style-name="TableRowCell" office:value-type="string">
            <text:p text:style-name="Table_20_Contents">চ্যাট ও পোলিং একসাথে সিঙ্ক করা</text:p>
          </table:table-cell>
        </table:table-row>
        <table:table-row>
          <table:table-cell table:style-name="TableRowCell" office:value-type="string">
            <text:p text:style-name="Table_20_Contents">৪</text:p>
          </table:table-cell>
          <table:table-cell table:style-name="TableRowCell" office:value-type="string">
            <text:p text:style-name="Table_20_Contents">মোবাইল রেসপন্সিভনেস</text:p>
          </table:table-cell>
          <table:table-cell table:style-name="TableRowCell" office:value-type="string">
            <text:p text:style-name="Table_20_Contents">চ্যাট পেজের সাইডবার মোবাইলে হাইড করা</text:p>
          </table:table-cell>
        </table:table-row>
        <table:table-row>
          <table:table-cell table:style-name="TableRowCell" office:value-type="string">
            <text:p text:style-name="Table_20_Contents">৫</text:p>
          </table:table-cell>
          <table:table-cell table:style-name="TableRowCell" office:value-type="string">
            <text:p text:style-name="Table_20_Contents">ইমেইল ডেলিভারি</text:p>
          </table:table-cell>
          <table:table-cell table:style-name="TableRowCell" office:value-type="string">
            <text:p text:style-name="Table_20_Contents">Resend API-র ফ্রি লিমিট (১০০/দিন)</text:p>
          </table:table-cell>
        </table:table-row>
        <table:table-row>
          <table:table-cell table:style-name="TableRowCell" office:value-type="string">
            <text:p text:style-name="Table_20_Contents">৬</text:p>
          </table:table-cell>
          <table:table-cell table:style-name="TableRowCell" office:value-type="string">
            <text:p text:style-name="Table_20_Contents">ডাটাবেস স্কেলিং</text:p>
          </table:table-cell>
          <table:table-cell table:style-name="TableRowCell" office:value-type="string">
            <text:p text:style-name="Table_20_Contents">MongoDB Atlas M0 টিয়ারের 512MB সীমা</text:p>
          </table:table-cell>
        </table:table-row>
      </table:table>
      <text:h text:style-name="Heading_20_3" text:outline-level="3"><text:bookmark-start text:name="সমবদধত"/>১২.২ সীমাবদ্ধতা<text:bookmark-end text:name="সমবদধত"/></text:h>
      <text:list text:style-name="L9">
        <text:list-item>
          <text:p text:style-name="P325"><text:span text:style-name="T1">ফোন নম্বর যাচাই:</text:span> বর্তমানে SMS ভিত্তিক ফোন নম্বর যাচাই নেই।</text:p>
        </text:list-item>
        <text:list-item>
          <text:p text:style-name="P325"><text:span text:style-name="T1">পেমেন্ট সিস্টেম:</text:span> রক্তদানের জন্য কোনো পেমেন্ট বা পুরস্কার সিস্টেম নেই।</text:p>
        </text:list-item>
        <text:list-item>
          <text:p text:style-name="P325"><text:span text:style-name="T1">মাল্টি-ল্যাংগুয়েজ:</text:span> শুধুমাত্র ইংরেজি ও বাংলা সমর্থিত।</text:p>
        </text:list-item>
        <text:list-item>
          <text:p text:style-name="P325"><text:span text:style-name="T1">অফলাইন সাপোর্ট:</text:span> অফলাইনে কোনো ফিচার কাজ করে না।</text:p>
        </text:list-item>
        <text:list-item>
          <text:p text:style-name="P325"><text:span text:style-name="T1">অ্যাডভান্সড সার্চ:</text:span> জটিল কোয়েরি (যেমন: নির্দিষ্ট সময়ের রক্তদাতা) সমর্থিত নয়।</text:p>
        </text:list-item>
      </text:list>
      <text:p text:style-name="Horizontal_20_Line"/>
      <text:h text:style-name="Heading_20_2" text:outline-level="2"><text:bookmark-start text:name="ভবষযৎ-উননযন-future-improvements"/>১৩. ভবিষ্যৎ উন্নয়ন (Future Improvements)<text:bookmark-end text:name="ভবষযৎ-উননযন-future-improvements"/></text:h>
      <text:list text:style-name="L10">
        <text:list-item>
          <text:p text:style-name="P326"><text:span text:style-name="T1">SMS নোটিফিকেশন:</text:span> এসএমএস এর মাধ্যমে রক্তের অনুরোধ ও কানেকশন রিকোয়েস্ট পাঠানো।</text:p>
        </text:list-item>
        <text:list-item>
          <text:p text:style-name="P326"><text:span text:style-name="T1">পেমেন্ট ইন্টিগ্রেশন:</text:span> রক্তদাতাদের জন্য বোনাস বা পুরস্কার সিস্টেম।</text:p>
        </text:list-item>
        <text:list-item>
          <text:p text:style-name="P326"><text:span text:style-name="T1">অ্যাডভান্সড অ্যানালিটিক্স:</text:span> রক্তদানের প্যাটার্ন বিশ্লেষণ ও রিপোর্ট।</text:p>
        </text:list-item>
        <text:list-item>
          <text:p text:style-name="P326"><text:span text:style-name="T1">মাল্টি-ল্যাংগুয়েজ সাপোর্ট:</text:span> বাংলা, ইংরেজি, আরবি সমর্থন।</text:p>
        </text:list-item>
        <text:list-item>
          <text:p text:style-name="P326"><text:span text:style-name="T1">মোবাইল অ্যাপ:</text:span> React Native ব্যবহার করে নেটিভ মোবাইল অ্যাপ তৈরি।</text:p>
        </text:list-item>
        <text:list-item>
          <text:p text:style-name="P326"><text:span text:style-name="T1">AI-ভিত্তিক ম্যাচিং:</text:span> মেশিন লার্নিং ব্যবহার করে সেরা রক্তদাতা সুপারিশ।</text:p>
        </text:list-item>
        <text:list-item>
          <text:p text:style-name="P326"><text:span text:style-name="T1">ইন্টিগ্রেটেড ম্যাপ:</text:span> Google Maps API ব্যবহার করে ইন্টারেক্টিভ ম্যাপে রক্তদাতা দেখানো।</text:p>
        </text:list-item>
        <text:list-item>
          <text:p text:style-name="P326"><text:span text:style-name="T1">অনুরোধের জিওফেন্সিং:</text:span> নির্দিষ্ট এলাকার মধ্যে রক্তের অনুরোধ সীমাবদ্ধ করা।</text:p>
        </text:list-item>
      </text:list>
      <text:p text:style-name="Horizontal_20_Line"/>
      <text:h text:style-name="Heading_20_2" text:outline-level="2"><text:bookmark-start text:name="উপসহর-conclusion"/>১৪. উপসংহার (Conclusion)<text:bookmark-end text:name="উপসহর-conclusion"/></text:h>
      <text:p text:style-name="First_20_paragraph"><text:span text:style-name="T1">BloodDrop</text:span> রক্তদান ব্যবস্থাপনা সিস্টেমটি বাংলাদেশে রক্তদান প্রক্রিয়াকে ডিজিটালাইজ করার একটি সফল প্রচেষ্টা। এই প্রকল্পে আমরা একটি আধুনিক, ব্যবহারকারী-বান্ধব এবং নিরাপদ প্ল্যাটফর্ম তৈরি করেছি যা:</text:p>
      <text:list text:style-name="L11">
        <text:list-item>
          <text:p text:style-name="P327"><text:span text:style-name="T1">সময় বাঁচায়:</text:span> জরুরি পরিস্থিতিতে দ্রুত রক্তদাতা খুঁজে পাওয়া যায়।</text:p>
        </text:list-item>
        <text:list-item>
          <text:p text:style-name="P327"><text:span text:style-name="T1">নির্ভরযোগ্য:</text:span> যাচাইকৃত ব্যবহারকারী ও রেটিং সিস্টেমের মাধ্যমে বিশ্বাসযোগ্যতা নিশ্চিত করে।</text:p>
        </text:list-item>
        <text:list-item>
          <text:p text:style-name="P327"><text:span text:style-name="T1">সহজ:</text:span> সহজ ইন্টারফেস ও রিয়েল-টাইম চ্যাটের মাধ্যমে যোগাযোগ সহজ করে।</text:p>
        </text:list-item>
        <text:list-item>
          <text:p text:style-name="P327"><text:span text:style-name="T1">উৎসাহদায়ক:</text:span> গেমিফিকেশন সিস্টেমের মাধ্যমে রক্তদাতাদের উৎসাহিত করে।</text:p>
        </text:list-item>
      </text:list>
      <text:p text:style-name="First_20_paragraph">প্রকল্পটি বাস্তবায়নের ক্ষেত্রে React.js, Express.js, MongoDB Atlas, এবং Socket.IO-এর মতো আধুনিক প্রযুক্তি ব্যবহার করা হয়েছে। সিস্টেমটি Vercel ও Render-এ ডিপ্লয় করা হয়েছে এবং এটি মূল্যায়নের জন্য উন্মুক্ত।</text:p>
      <text:p text:style-name="Text_20_body">আমাদের বিশ্বাস, এই সিস্টেমটি বাংলাদেশে রক্তদান সংকট কমাতে এবং রক্তদাতা ও রক্তপ্রাপকদের মধ্যে সেতুবন্ধন তৈরিতে গুরুত্বপূর্ণ ভূমিকা পালন করতে পারবে।</text:p>
      <text:p text:style-name="Horizontal_20_Line"/>
      <text:h text:style-name="Heading_20_2" text:outline-level="2"><text:bookmark-start text:name="গরনথপঞজ-references"/>১৫. গ্রন্থপঞ্জি (References)<text:bookmark-end text:name="গরনথপঞজ-references"/></text:h>
      <text:list text:style-name="L12">
        <text:list-item>
          <text:p text:style-name="P328">MongoDB Official Documentation. (2024). <text:span text:style-name="T2">MongoDB Manual</text:span>. https://docs.mongodb.com/manual/</text:p>
        </text:list-item>
        <text:list-item>
          <text:p text:style-name="P328">Express.js Official Documentation. (2024). <text:span text:style-name="T2">Express.js Guide</text:span>. https://expressjs.com/en/guide/routing.html</text:p>
        </text:list-item>
        <text:list-item>
          <text:p text:style-name="P328">React Official Documentation. (2024). <text:span text:style-name="T2">React – A JavaScript Library for Building User Interfaces</text:span>. https://react.dev/</text:p>
        </text:list-item>
        <text:list-item>
          <text:p text:style-name="P328">Socket.IO Official Documentation. (2024). <text:span text:style-name="T2">Socket.IO Documentation</text:span>. https://socket.io/docs/v4/</text:p>
        </text:list-item>
        <text:list-item>
          <text:p text:style-name="P328">MDN Web Docs. (2024). <text:span text:style-name="T2">WebSocket API – Web APIs | MDN</text:span>. https://developer.mozilla.org/en-US/docs/Web/API/WebSocket_API</text:p>
        </text:list-item>
        <text:list-item>
          <text:p text:style-name="P328">Vercel Documentation. (2024). <text:span text:style-name="T2">Deploying Web Applications</text:span>. https://vercel.com/docs</text:p>
        </text:list-item>
        <text:list-item>
          <text:p text:style-name="P328">Render Documentation. (2024). <text:span text:style-name="T2">Web Services Documentation</text:span>. https://render.com/docs</text:p>
        </text:list-item>
        <text:list-item>
          <text:p text:style-name="P328">Bangladesh Red Crescent Society. (2024). <text:span text:style-name="T2">Blood Donation Statistics</text:span>. https://www.red-crescent.org.bd/</text:p>
        </text:list-item>
        <text:list-item>
          <text:p text:style-name="P328">Resend Official Documentation. (2024). <text:span text:style-name="T2">Resend API Documentation</text:span>. https://resend.com/docs</text:p>
        </text:list-item>
        <text:list-item>
          <text:p text:style-name="P328">Tailwind CSS Documentation. (2024). <text:span text:style-name="T2">Utility-First CSS Framework</text:span>. https://tailwindcss.com/docs</text:p>
        </text:list-item>
      </text:list>
      <text:p text:style-name="Horizontal_20_Line"/>
      <text:h text:style-name="Heading_20_3" text:outline-level="3"><text:bookmark-start text:name="পরকলপ-পরচলকর-সবকষর"/>প্রকল্প পরিচালকের স্বাক্ষর<text:bookmark-end text:name="পরকলপ-পরচলকর-সবকষর"/></text:h>
      <text:p text:style-name="Horizontal_20_Line"/>
      <text:p text:style-name="First_20_paragraph"><text:span text:style-name="T1">MD. Eshtiak Ahmed</text:span> প্রধান উন্নয়নকারী (Lead Developer)</text:p>
      <text:p text:style-name="Text_20_body">তারিখ: _______________</text:p>
      <text:p text:style-name="Horizontal_20_Line"/>
      <text:p text:style-name="First_20_paragraph"><text:span text:style-name="T1">[উপদেষ্টার নাম]</text:span> উপদেষ্টা/পর্যবেক্ষক</text:p>
      <text:p text:style-name="Text_20_body">তারিখ: _______________</text:p>
      <text:p text:style-name="Horizontal_20_Line"/>
      <text:p text:style-name="First_20_paragraph"><text:span text:style-name="T1">[প্রতিষ্ঠানের সিল]</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6-07-21T07:32:07Z</meta:creation-date>
    <dc:date>2026-07-21T07:32:07Z</dc:date>
  </office:meta>
</office:document-meta>
</file>